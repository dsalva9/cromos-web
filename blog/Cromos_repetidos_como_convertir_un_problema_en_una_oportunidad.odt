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list-style-name=""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omos repetidos: cómo convertir un problema en una oportunidad</text:p>
      <text:p text:style-name="Standard">Pregúntale a cualquier coleccionista cuál es el momento en el que un álbum empieza a complicarse y la respuesta casi siempre será la misma: cuando los cromos repetidos empiezan a aparecer uno detrás de otro. Al principio hacen gracia. Después ocupan una caja. Finalmente, acaban siendo una montaña que parece no servir para nada.</text:p>
      <text:p text:style-name="Standard">Sin embargo, los cromos repetidos no son el enemigo de una colección. De hecho, suelen ser la herramienta que permite terminarla. La diferencia está en cómo los gestionas.</text:p>
      <text:list xml:id="list2052571010362445691" text:style-name="Outline">
        <text:list-item>
          <text:list>
            <text:list-item>
              <text:h text:style-name="Heading_20_2" text:outline-level="2">¿Por qué aparecen tantos repetidos?</text:h>
            </text:list-item>
          </text:list>
        </text:list-item>
      </text:list>
      <text:p text:style-name="Standard">Es algo completamente normal. A medida que completas un álbum, cada sobre tiene menos probabilidades de contener un cromo nuevo. No significa que tengas mala suerte; simplemente la estadística juega en tu contra. Por eso llega un momento en el que seguir comprando sobres deja de ser la opción más rentable.</text:p>
      <text:p text:style-name="Standard">Un cromo repetido solo parece no tener valor mientras está guardado en un cajón. En cuanto otra persona lo necesita, se convierte en una moneda de cambio. Esa es la esencia del coleccionismo: dos personas pueden ayudarse mutuamente a avanzar sin gastar más dinero.</text:p>
      <text:p text:style-name="Standard">Uno de los errores más habituales es acumular repetidos en una caja. Cuando alguien pregunta si tienes un número concreto, toca revisar decenas o cientos de cromos. Clasificarlos por número o mantener una lista actualizada te ahorrará muchísimo tiempo.</text:p>
      <text:list xml:id="list31882691" text:continue-numbering="true" text:style-name="Outline">
        <text:list-item>
          <text:list>
            <text:list-item>
              <text:h text:style-name="Heading_20_2" text:outline-level="2">Cuándo es mejor intercambiar que comprar</text:h>
            </text:list-item>
          </text:list>
        </text:list-item>
      </text:list>
      <text:p text:style-name="Standard">Si acabas de empezar una colección, comprar sobres sigue teniendo sentido porque casi todo será nuevo. Pero cuando el álbum supera aproximadamente la mitad de su contenido, cada repetido empieza a tener más valor que un sobre adicional. Es el momento de buscar intercambios.</text:p>
      <text:p text:style-name="Standard">Puedes empezar por familiares, amigos o compañeros que estén haciendo la misma colección. Después llegan los mercadillos, las comunidades de coleccionistas y las plataformas especializadas. Cuantas más personas puedan ver tus repetidos, más posibilidades tendrás de encontrar un intercambio interesante.</text:p>
      <text:list xml:id="list31874159" text:continue-numbering="true" text:style-name="Outline">
        <text:list-item>
          <text:list>
            <text:list-item>
              <text:h text:style-name="Heading_20_2" text:outline-level="2">Cuida también los repetidos</text:h>
            </text:list-item>
          </text:list>
        </text:list-item>
      </text:list>
      <text:p text:style-name="Standard">No porque vayas a quedarte con ellos para siempre, sino porque otra persona espera recibirlos en buen estado. Evita doblarlos, escribir sobre ellos o transportarlos sin protección. Un cromo bien conservado siempre será más fácil de intercambiar.</text:p>
      <text:p text:style-name="Standard">Hay cromos que pasan semanas sin despertar interés y, de repente, empiezan a moverse cuando más personas avanzan en la colección. Mantener cuidada tu colección te permitirá aprovechar esas oportunidades sin tener que volver a revisar toda la caja desde cero.</text:p>
      <text:list xml:id="list31872143" text:continue-numbering="true" text:style-name="Outline">
        <text:list-item>
          <text:list>
            <text:list-item>
              <text:h text:style-name="Heading_20_2" text:outline-level="2"><text:soft-page-break/>Una ayuda cuando la colección crece</text:h>
            </text:list-item>
          </text:list>
        </text:list-item>
      </text:list>
      <text:p text:style-name="Standard">Cuando los repetidos son pocos, una libreta puede ser suficiente. Pero si la colección es grande o participas en varias a la vez, resulta mucho más práctico utilizar una herramienta que registre automáticamente qué tienes y qué buscas. Así puedes dedicar menos tiempo a gestionar listas y más a disfrutar del coleccionismo.</text:p>
      <text:p text:style-name="Standard">Al final, casi todos los álbumes se terminan de la misma manera: gracias a esos cromos repetidos que un día parecían un problema y acabaron convirtiéndose en la pieza que abrió la puerta al siguiente intercambio. Si consigues cambiar la forma de verlos, dejarán de ocupar espacio para empezar a acercarte al objetivo de completar tu colec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mbria"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alibri" fo:font-size="11pt" style:font-size-asian="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Standard" style:default-outline-level="" style:list-style-name="" style:class="list">
      <style:paragraph-properties fo:margin-left="0.635cm" fo:margin-right="0cm" fo:text-indent="-0.635cm" style:auto-text-indent="false"/>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font-name-complex="F"/>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name-complex="F"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name-complex="F"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ody_20_Text_20_2" style:display-name="Body Text 2" style:family="paragraph" style:parent-style-name="Standard" style:default-outline-level="" style:list-style-name="">
      <style:paragraph-properties fo:margin-top="0cm" fo:margin-bottom="0.212cm" fo:line-height="200%"/>
    </style:style>
    <style:style style:name="Body_20_Text_20_3" style:display-name="Body Text 3" style:family="paragraph" style:parent-style-name="Standard" style:default-outline-level="" style:list-style-name="">
      <style:paragraph-properties fo:margin-top="0cm" fo:margin-bottom="0.212cm"/>
      <style:text-properties fo:font-size="8pt" style:font-size-asian="8pt" style:font-size-complex="8pt"/>
    </style:style>
    <style:style style:name="List_20_2" style:display-name="List 2" style:family="paragraph" style:parent-style-name="Standard" style:default-outline-level="" style:list-style-name="" style:class="list">
      <style:paragraph-properties fo:margin-left="1.27cm" fo:margin-right="0cm" fo:margin-top="0cm" fo:margin-bottom="0.212cm" fo:text-indent="-0.635cm" style:auto-text-indent="false"/>
    </style:style>
    <style:style style:name="List_20_3" style:display-name="List 3" style:family="paragraph" style:parent-style-name="Standard" style:default-outline-level="" style:list-style-name="" style:class="list">
      <style:paragraph-properties fo:margin-left="1.905cm" fo:margin-right="0cm" fo:margin-top="0cm" fo:margin-bottom="0.212cm" fo:text-indent="-0.635cm"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default-outline-level="1" style:list-style-name="Outline"/>
    <style:style style:name="List_20_Continue" style:display-name="List Continue" style:family="paragraph" style:parent-style-name="Standard" style:default-outline-level="" style:list-style-name="">
      <style:paragraph-properties fo:margin-left="0.635cm" fo:margin-right="0cm" fo:margin-top="0cm" fo:margin-bottom="0.212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margin-top="0cm" fo:margin-bottom="0.212cm" fo:text-indent="0cm" style:auto-text-indent="false"/>
    </style:style>
    <style:style style:name="List_20_Continue_20_3" style:display-name="List Continue 3" style:family="paragraph" style:parent-style-name="Standard" style:default-outline-level="" style:list-style-name="">
      <style:paragraph-properties fo:margin-left="1.905cm" fo:margin-right="0cm" fo:margin-top="0cm" fo:margin-bottom="0.212cm" fo:text-indent="0cm" style:auto-text-indent="false"/>
    </style:style>
    <style:style style:name="macro" style:family="paragraph" style:default-outline-level="" style:list-style-name="">
      <style:paragraph-properties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style:font-name="Courier" fo:font-size="10pt" style:font-size-asian="10pt" style:font-size-complex="10pt"/>
    </style:style>
    <style:style style:name="Quote" style:family="paragraph" style:parent-style-name="Standard" style:default-outline-level="" style:list-style-name="">
      <style:text-properties fo:color="#000000" fo:font-style="italic" style:font-style-asian="italic" style:font-style-complex="italic"/>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name-complex="F" style:font-weight-complex="bold"/>
    </style:style>
    <style:style style:name="Title_20_Char" style:display-name="Title Char" style:family="text" style:parent-style-name="Default_20_Paragraph_20_Font">
      <style:text-properties fo:color="#17365d" style:font-name="Calibri" fo:font-size="26pt" fo:letter-spacing="0.009cm" style:letter-kerning="true" style:font-size-asian="26pt" style:font-name-complex="F" style:font-size-complex="26pt"/>
    </style:style>
    <style:style style:name="Subtitle_20_Char" style:display-name="Subtitle Char" style:family="text" style:parent-style-name="Default_20_Paragraph_20_Font">
      <style:text-properties fo:color="#4f81bd" style:font-name="Calibri" fo:font-size="12pt" fo:letter-spacing="0.026cm" fo:font-style="italic" style:font-size-asian="12pt" style:font-style-asian="italic" style:font-name-complex="F"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fo:color="#243f60" style:font-name="Calibri" style:font-name-complex="F"/>
    </style:style>
    <style:style style:name="Heading_20_6_20_Char" style:display-name="Heading 6 Char" style:family="text" style:parent-style-name="Default_20_Paragraph_20_Font">
      <style:text-properties fo:color="#243f60" style:font-name="Calibri" fo:font-style="italic" style:font-style-asian="italic" style:font-name-complex="F" style:font-style-complex="italic"/>
    </style:style>
    <style:style style:name="Heading_20_7_20_Char" style:display-name="Heading 7 Char" style:family="text" style:parent-style-name="Default_20_Paragraph_20_Font">
      <style:text-properties fo:color="#404040" style:font-name="Calibri" fo:font-style="italic" style:font-style-asian="italic" style:font-name-complex="F" style:font-style-complex="italic"/>
    </style:style>
    <style:style style:name="Heading_20_8_20_Char" style:display-name="Heading 8 Char" style:family="text" style:parent-style-name="Default_20_Paragraph_20_Font">
      <style:text-properties fo:color="#4f81bd" style:font-name="Calibri" fo:font-size="10pt" style:font-size-asian="10pt" style:font-name-complex="F" style:font-size-complex="10pt"/>
    </style:style>
    <style:style style:name="Heading_20_9_20_Char" style:display-name="Heading 9 Char" style:family="text" style:parent-style-name="Default_20_Paragraph_20_Font">
      <style:text-properties fo:color="#404040" style:font-name="Calibri" fo:font-size="10pt" fo:font-style="italic" style:font-size-asian="10pt" style:font-style-asian="italic" style:font-name-complex="F"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text:outline-style style:name="Outline">
      <text:outline-level-style text:level="1"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ython-docx</meta:initial-creator>
    <dc:description>generated by python-docx</dc:description>
    <meta:editing-cycles>1</meta:editing-cycles>
    <meta:creation-date>2013-12-23T23:15:00</meta:creation-date>
    <dc:date>2026-06-26T11:59:52.78</dc:date>
    <meta:editing-duration>P0D</meta:editing-duration>
    <meta:generator>OpenOffice/4.1.14$Win32 OpenOffice.org_project/4114m1$Build-9811</meta:generator>
    <meta:document-statistic meta:table-count="0" meta:image-count="0" meta:object-count="0" meta:page-count="2" meta:paragraph-count="16" meta:word-count="518" meta:character-count="3271"/>
    <dc:creator>Alberto Pujol</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
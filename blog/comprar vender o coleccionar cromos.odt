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prar, vender o intercambiar cromos: todo lo que debes saber antes de empezar</text:h>
      <text:p text:style-name="Text_20_body">Quien nunca ha hecho una colección suele pensar que el camino es muy sencillo: compras sobres hasta completar el álbum y listo.</text:p>
      <text:p text:style-name="Text_20_body">La realidad es bastante diferente.</text:p>
      <text:p text:style-name="Text_20_body">Con el paso de las semanas aparecen los cromos repetidos, empiezan a faltar siempre los mismos números y llega un momento en el que casi todos los coleccionistas se hacen la misma pregunta:</text:p>
      <text:p text:style-name="Text_20_body"><text:span text:style-name="Strong_20_Emphasis">¿Sigo comprando sobres, compro los cromos que me faltan o intento intercambiarlos?</text:span></text:p>
      <text:p text:style-name="Text_20_body">No existe una única respuesta. Todo depende del momento en el que se encuentre la colección y de lo que busques como aficionado.</text:p>
      <text:h text:style-name="Heading_20_2" text:outline-level="2">Comprar sobres sigue teniendo sentido... al principio</text:h>
      <text:p text:style-name="Text_20_body">Abrir un sobre forma parte de la esencia del coleccionismo. La sorpresa, la posibilidad de encontrar ese jugador que esperabas o esa carta especial es una parte importante de la experiencia.</text:p>
      <text:p text:style-name="Text_20_body">Además, durante las primeras semanas de una colección, la mayoría de cromos serán nuevos. Es el momento en el que comprar sobres resulta más rentable.</text:p>
      <text:p text:style-name="Text_20_body">Sin embargo, esa situación cambia bastante rápido.</text:p>
      <text:p text:style-name="Text_20_body">Cuando el álbum empieza a llenarse, cada sobre tiene más posibilidades de contener cromos repetidos que cromos nuevos. A partir de ahí, seguir comprando deja de ser tan eficiente.</text:p>
      <text:h text:style-name="Heading_20_2" text:outline-level="2">¿Cuándo merece la pena comprar cromos sueltos?</text:h>
      <text:p text:style-name="Text_20_body">Hay un momento muy concreto en el que comprar un cromo individual suele tener sentido.</text:p>
      <text:p text:style-name="Text_20_body">Imagina que solo te faltan tres cromos para terminar el álbum.</text:p>
      <text:p text:style-name="Text_20_body">Puedes seguir comprando sobres durante días con la esperanza de que aparezcan... o comprarlos directamente.</text:p>
      <text:p text:style-name="Text_20_body">Muchos coleccionistas optan por esta segunda opción porque, haciendo números, suele salir bastante más económica.</text:p>
      <text:p text:style-name="Text_20_body">Eso sí, antes de comprar conviene comprobar dos cosas:</text:p>
      <text:list xml:id="list7474302255217961095" text:style-name="L1">
        <text:list-item>
          <text:p text:style-name="P1">Que realmente sea el cromo que necesitas.</text:p>
        </text:list-item>
        <text:list-item>
          <text:p text:style-name="P1">Que el precio sea razonable.</text:p>
        </text:list-item>
      </text:list>
      <text:p text:style-name="Text_20_body">No es raro encontrar diferencias importantes entre distintos vendedores.</text:p>
      <text:h text:style-name="Heading_20_2" text:outline-level="2">Vender cromos: mucho más que poner un anuncio</text:h>
      <text:p text:style-name="Text_20_body">Vender cromos parece sencillo.</text:p>
      <text:p text:style-name="Text_20_body">Subes unas fotos, pones un precio y esperas.</text:p>
      <text:p text:style-name="Text_20_body">Pero la realidad es que el mercado funciona de otra manera.</text:p>
      <text:p text:style-name="Text_20_body">Los cromos normales de colecciones recientes suelen tener poco valor individual. En cambio, algunas cartas especiales, ediciones limitadas o cromos antiguos pueden despertar mucho interés <text:soft-page-break/>entre los coleccionistas.</text:p>
      <text:p text:style-name="Text_20_body">También influye el estado de conservación.</text:p>
      <text:p text:style-name="Text_20_body">Un mismo cromo puede tener un valor muy distinto dependiendo de si está impecable o presenta esquinas dobladas, marcas o desgaste.</text:p>
      <text:p text:style-name="Text_20_body">Por eso merece la pena dedicar unos minutos a conservar correctamente cualquier colección.</text:p>
      <text:h text:style-name="Heading_20_2" text:outline-level="2">¿Cómo saber cuánto vale un cromo?</text:h>
      <text:p text:style-name="Text_20_body">Es una de las preguntas más repetidas.</text:p>
      <text:p text:style-name="Text_20_body">Y también una de las más difíciles de responder.</text:p>
      <text:p text:style-name="Text_20_body">No existe una lista de precios universal.</text:p>
      <text:p text:style-name="Text_20_body">El valor depende de muchos factores:</text:p>
      <text:list xml:id="list449386614905179614" text:style-name="L2">
        <text:list-item>
          <text:p text:style-name="P2">La rareza.</text:p>
        </text:list-item>
        <text:list-item>
          <text:p text:style-name="P2">La demanda.</text:p>
        </text:list-item>
        <text:list-item>
          <text:p text:style-name="P2">El estado de conservación.</text:p>
        </text:list-item>
        <text:list-item>
          <text:p text:style-name="P2">La antigüedad.</text:p>
        </text:list-item>
        <text:list-item>
          <text:p text:style-name="P2">La colección a la que pertenece.</text:p>
        </text:list-item>
        <text:list-item>
          <text:p text:style-name="P2">La facilidad para encontrar otros ejemplares.</text:p>
        </text:list-item>
      </text:list>
      <text:p text:style-name="Text_20_body">En ocasiones un cromo aparentemente normal puede ser mucho más difícil de conseguir que otro con un diseño más llamativo.</text:p>
      <text:p text:style-name="Text_20_body">Por eso conviene investigar un poco antes de poner un precio o aceptar una oferta.</text:p>
      <text:h text:style-name="Heading_20_2" text:outline-level="2">El intercambio sigue siendo la opción más inteligente</text:h>
      <text:p text:style-name="Text_20_body">Curiosamente, muchos coleccionistas pasan por alto la alternativa que suele resultar más rentable.</text:p>
      <text:p text:style-name="Text_20_body">Si tienes cromos repetidos, probablemente otra persona los esté buscando.</text:p>
      <text:p text:style-name="Text_20_body">Y esa misma persona puede tener exactamente los que faltan en tu álbum.</text:p>
      <text:p text:style-name="Text_20_body">En lugar de gastar dinero comprando más sobres o adquiriendo cromos sueltos, un intercambio permite que ambas personas avancen en sus colecciones.</text:p>
      <text:p text:style-name="Text_20_body">Por eso sigue siendo una de las prácticas más habituales dentro del coleccionismo.</text:p>
      <text:h text:style-name="Heading_20_2" text:outline-level="2">Comprar por impulso suele salir caro</text:h>
      <text:p text:style-name="Text_20_body">Cuando una colección acaba de salir es fácil dejarse llevar por la emoción.</text:p>
      <text:p text:style-name="Text_20_body">Aparecen ediciones especiales, cajas de sobres, cartas exclusivas y anuncios por todas partes.</text:p>
      <text:p text:style-name="Text_20_body">No hay nada malo en disfrutar de ese momento, pero conviene marcarse un presupuesto desde el principio.</text:p>
      <text:p text:style-name="Text_20_body">Muchos coleccionistas descubren demasiado tarde que podrían haber completado la misma colección gastando bastante menos simplemente organizando mejor sus repetidos e intercambiándolos.</text:p>
      <text:h text:style-name="Heading_20_2" text:outline-level="2"><text:soft-page-break/>Internet ha cambiado por completo este mercado</text:h>
      <text:p text:style-name="Text_20_body">Hace unos años encontrar un comprador o una persona interesada en un intercambio podía llevar semanas.</text:p>
      <text:p text:style-name="Text_20_body">Hoy basta con entrar en una comunidad especializada.</text:p>
      <text:p text:style-name="Text_20_body">Existen plataformas para comprar y vender, grupos de aficionados y aplicaciones diseñadas específicamente para poner en contacto a coleccionistas.</text:p>
      <text:p text:style-name="Text_20_body">Eso ha hecho que el mercado sea mucho más dinámico y que resulte más sencillo encontrar justo el cromo o la carta que buscas.</text:p>
      <text:p text:style-name="Text_20_body">También significa que conviene actuar con prudencia.</text:p>
      <text:p text:style-name="Text_20_body">Antes de comprar o vender a otra persona es recomendable revisar su reputación, pedir fotografías claras y acordar todas las condiciones con antelación.</text:p>
      <text:h text:style-name="Heading_20_2" text:outline-level="2">Entonces... ¿qué opción es mejor?</text:h>
      <text:p text:style-name="Text_20_body">La mayoría de coleccionistas con experiencia termina utilizando las tres.</text:p>
      <text:p text:style-name="Text_20_body">Compran sobres al principio porque forman parte de la diversión.</text:p>
      <text:p text:style-name="Text_20_body">Intercambian cuando empiezan a acumular repetidos.</text:p>
      <text:p text:style-name="Text_20_body">Y, si al final solo quedan uno o dos cromos realmente difíciles de conseguir, valoran comprarlos de forma individual.</text:p>
      <text:p text:style-name="Text_20_body">No hay una única forma correcta de completar una colección.</text:p>
      <text:p text:style-name="Text_20_body">Lo importante es entender que comprar, vender e intercambiar no son opciones enfrentadas.</text:p>
      <text:p text:style-name="Text_20_body">Son herramientas distintas para momentos diferentes.</text:p>
      <text:p text:style-name="Text_20_body">Y cuanto mejor conozcas cómo funciona cada una, más fácil será disfrutar del coleccionismo sin gastar más dinero del necesario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berto Pujol</meta:initial-creator>
    <meta:creation-date>2026-06-26T12:22:33.23</meta:creation-date>
    <meta:document-statistic meta:table-count="0" meta:image-count="0" meta:object-count="0" meta:page-count="3" meta:paragraph-count="68" meta:word-count="852" meta:character-count="5422"/>
    <dc:date>2026-06-26T12:23:54.29</dc:date>
    <dc:creator>Alberto Pujol</dc:creator>
    <meta:editing-duration>PT1M21S</meta:editing-duration>
    <meta:editing-cycles>1</meta:editing-cycles>
    <meta:generator>OpenOffice/4.1.14$Win32 OpenOffice.org_project/4114m1$Build-9811</meta:generator>
  </office:meta>
</office:document-meta>
</file>
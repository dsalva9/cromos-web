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ómo empezar una colección de cartas Pokémon</text:h>
      <text:p text:style-name="Text_20_body">Hay algo curioso en Pokémon. Mucha gente compra su primer sobre por nostalgia y acaba, casi sin darse cuenta, buscando <text:a xlink:type="simple" xlink:href="https://amzn.to/4oPA0at" text:style-name="Internet_20_link" text:visited-style-name="Visited_20_Internet_20_Link">fundas para proteger las cartas</text:a>, aprendiendo qué significa una carta holográfica o preguntándose si merece la pena guardar una determinada expansión.</text:p>
      <text:p text:style-name="Text_20_body">No importa si tienes ocho años o cuarenta. Las cartas Pokémon tienen esa capacidad de enganchar a personas de generaciones completamente distintas.</text:p>
      <text:p text:style-name="Text_20_body">Y quizá esa sea una de las razones por las que el mercado no ha dejado de crecer desde finales de los años noventa.</text:p>
      <text:p text:style-name="Text_20_body">Si estás pensando en empezar una colección, hay algunas cosas que conviene saber antes de lanzarte a comprar sobres.</text:p>
      <text:h text:style-name="Heading_20_2" text:outline-level="2">No necesitas comprarlo todo</text:h>
      <text:p text:style-name="Text_20_body">Es uno de los errores más habituales.</text:p>
      <text:p text:style-name="Text_20_body">Muchos principiantes creen que para coleccionar cartas Pokémon hay que completar todas las expansiones que van saliendo. La realidad es que eso resulta prácticamente imposible para la mayoría de aficionados.</text:p>
      <text:p text:style-name="Text_20_body">Cada año aparecen nuevas colecciones con cientos de cartas diferentes. Intentar seguirlas todas supone una inversión enorme de tiempo y dinero.</text:p>
      <text:p text:style-name="Text_20_body">Por eso casi todos los coleccionistas terminan especializándose.</text:p>
      <text:p text:style-name="Text_20_body">Hay quien colecciona únicamente una expansión concreta. Otros buscan cartas de un Pokémon determinado, como Pikachu, Charizard o Eevee. También hay aficionados que solo conservan cartas promocionales o ediciones especiales.</text:p>
      <text:p text:style-name="Text_20_body">No existe una forma correcta de coleccionar.</text:p>
      <text:p text:style-name="Text_20_body">Lo importante es encontrar aquello que realmente disfrutas.</text:p>
      <text:h text:style-name="Heading_20_2" text:outline-level="2">¿Coleccionar o jugar?</text:h>
      <text:p text:style-name="Text_20_body">Aunque ambas cosas están relacionadas, no son exactamente lo mismo.</text:p>
      <text:p text:style-name="Text_20_body">Hay personas que compran cartas para construir mazos y competir.</text:p>
      <text:p text:style-name="Text_20_body">Otras nunca llegan a jugar una partida.</text:p>
      <text:p text:style-name="Text_20_body">Simplemente disfrutan organizando las cartas, completando colecciones y encontrando nuevas piezas.</text:p>
      <text:p text:style-name="Text_20_body">Con el tiempo es habitual mezclar ambas facetas, pero conviene tener claro desde el principio cuál es tu objetivo.</text:p>
      <text:p text:style-name="Text_20_body">Eso también influirá en el tipo de cartas que comprarás.</text:p>
      <text:h text:style-name="Heading_20_2" text:outline-level="2">Abrir sobres sigue siendo parte de la magia</text:h>
      <text:p text:style-name="Text_20_body">Pocas sensaciones se parecen a abrir un sobre sin saber qué cartas aparecerán.</text:p>
      <text:p text:style-name="Text_20_body">Es parte de la esencia de Pokémon.</text:p>
      <text:p text:style-name="Text_20_body"><text:soft-page-break/>Sin embargo, también conviene ser realista.</text:p>
      <text:p text:style-name="Text_20_body">Si tu objetivo es conseguir una carta concreta, confiar únicamente en la suerte puede resultar frustrante.</text:p>
      <text:p text:style-name="Text_20_body">Muchos coleccionistas combinan ambas estrategias.</text:p>
      <text:p text:style-name="Text_20_body">Compran algunos sobres para disfrutar de la experiencia y, cuando buscan cartas muy específicas, recurren al intercambio o a la compra individual.</text:p>
      <text:h text:style-name="Heading_20_2" text:outline-level="2">Cuida las cartas desde el primer día</text:h>
      <text:p text:style-name="Text_20_body">No hace falta que una carta valga cientos de euros para merecer un buen cuidado.</text:p>
      <text:p text:style-name="Text_20_body">Una pequeña marca, una esquina doblada o un arañazo pueden reducir considerablemente su estado de conservación.</text:p>
      <text:p text:style-name="Text_20_body">Por eso la mayoría de coleccionistas utiliza fundas protectoras desde el primer momento.</text:p>
      <text:p text:style-name="Text_20_body">Las cartas más especiales suelen guardarse además en fundas rígidas o archivadores diseñados específicamente para este tipo de colecciones.</text:p>
      <text:p text:style-name="Text_20_body">Puede parecer un detalle menor, pero con el paso de los años se agradece haber adquirido ese hábito desde el principio.</text:p>
      <text:h text:style-name="Heading_20_2" text:outline-level="2">Los repetidos también tienen valor</text:h>
      <text:p text:style-name="Text_20_body">Cuando alguien empieza suele pensar que una carta repetida no sirve para nada.</text:p>
      <text:p text:style-name="Text_20_body">En realidad ocurre justo lo contrario.</text:p>
      <text:p text:style-name="Text_20_body">Los repetidos son la forma más sencilla de seguir ampliando la colección sin necesidad de comprar constantemente sobres nuevos.</text:p>
      <text:p text:style-name="Text_20_body">Cada carta que ya tienes puede convertirse en la pieza que otro coleccionista está buscando.</text:p>
      <text:p text:style-name="Text_20_body">Y esa persona puede tener precisamente la carta que llevas semanas intentando conseguir.</text:p>
      <text:p text:style-name="Text_20_body">Por eso el intercambio sigue siendo una parte tan importante del coleccionismo Pokémon.</text:p>
      <text:h text:style-name="Heading_20_2" text:outline-level="2">La comunidad es parte del hobby</text:h>
      <text:p text:style-name="Text_20_body">Una colección puede hacerse en solitario, pero suele disfrutarse mucho más cuando compartes la afición con otras personas.</text:p>
      <text:p text:style-name="Text_20_body">Hoy existen eventos, tiendas especializadas, grupos de aficionados y plataformas donde miles de coleccionistas muestran sus cartas, intercambian repetidos o simplemente comentan las nuevas expansiones.</text:p>
      <text:p text:style-name="Text_20_body">Participar en esa comunidad no solo hace el hobby más entretenido.</text:p>
      <text:p text:style-name="Text_20_body">También permite aprender muchísimo.</text:p>
      <text:p text:style-name="Text_20_body">Es habitual descubrir nuevas formas de organizar una colección, conocer cartas que no sabías que existían o encontrar personas con intereses muy parecidos a los tuyos.</text:p>
      <text:h text:style-name="Heading_20_2" text:outline-level="2">No te obsesiones con el valor económico</text:h>
      <text:p text:style-name="Text_20_body">Cada cierto tiempo aparecen noticias sobre cartas Pokémon vendidas por miles o incluso millones de euros.</text:p>
      <text:p text:style-name="Text_20_body"><text:soft-page-break/>Eso ha hecho que muchas personas empiecen una colección pensando únicamente en la inversión.</text:p>
      <text:p text:style-name="Text_20_body">Puede ocurrir que una carta aumente de valor con el tiempo, pero no debería ser la principal motivación.</text:p>
      <text:p text:style-name="Text_20_body">Las mejores colecciones suelen construirse poco a poco, disfrutando del proceso y comprando aquello que realmente te gusta.</text:p>
      <text:p text:style-name="Text_20_body">Si algún día una de esas cartas acaba siendo muy valiosa, será una buena noticia.</text:p>
      <text:p text:style-name="Text_20_body">Pero si no ocurre, seguirás teniendo una colección de la que sentirte orgulloso.</text:p>
      <text:h text:style-name="Heading_20_2" text:outline-level="2">Una afición que sigue creciendo</text:h>
      <text:p text:style-name="Text_20_body">Lejos de ser una moda pasajera, Pokémon continúa atrayendo nuevos aficionados cada año.</text:p>
      <text:p text:style-name="Text_20_body">Nuevas expansiones, ilustraciones espectaculares y una comunidad muy activa hacen que siempre haya algo nuevo por descubrir.</text:p>
      <text:p text:style-name="Text_20_body">Y cuando empiezan a aparecer las primeras cartas repetidas, sucede exactamente lo mismo que con cualquier otra colección: llega el momento de intercambiar.</text:p>
      <text:p text:style-name="Text_20_body">Porque, al final, una buena colección no se construye únicamente comprando sobres.</text:p>
      <text:p text:style-name="Text_20_body">También se construye compartiendo la afición con otros coleccionistas, descubriendo nuevas cartas y encontrando a esa persona que tiene justo la que llevabas tiempo busc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6-26T12:11:03.57</meta:creation-date>
    <meta:document-statistic meta:table-count="0" meta:image-count="0" meta:object-count="0" meta:page-count="3" meta:paragraph-count="59" meta:word-count="836" meta:character-count="5468"/>
    <dc:date>2026-06-26T12:17:22.99</dc:date>
    <dc:creator>Alberto Pujol</dc:creator>
    <meta:editing-duration>PT6M20S</meta:editing-duration>
    <meta:editing-cycles>1</meta:editing-cycles>
    <meta:generator>OpenOffice/4.1.14$Win32 OpenOffice.org_project/4114m1$Build-9811</meta:generator>
  </office:meta>
</office:document-meta>
</file>
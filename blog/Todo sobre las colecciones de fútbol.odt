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odo sobre las colecciones de fútbol: Panini, Topps, Adrenalyn XL y mucho más</text:h>
      <text:p text:style-name="Text_20_body">Si creciste en España, es muy probable que hayas tenido un álbum de cromos de fútbol entre las manos. Quizá fuera el de la Liga, quizá uno de un Mundial o incluso una colección que hoy apenas recuerdas. Lo que seguramente sí recuerdes es la sensación de abrir un sobre sin saber qué jugadores iban a aparecer.</text:p>
      <text:p text:style-name="Text_20_body">Han pasado décadas desde aquellas primeras colecciones y, sin embargo, hay cosas que apenas han cambiado. Los sobres siguen abriéndose con la misma ilusión, los cromos repetidos continúan acumulándose y completar un álbum sigue siendo casi una misión personal para miles de aficionados cada temporada.</text:p>
      <text:p text:style-name="Text_20_body">Lo que sí ha cambiado es el propio mundo del coleccionismo. Hoy existen muchas más colecciones, nuevos fabricantes, ediciones especiales, cartas limitadas y una comunidad de aficionados mucho más conectada que hace unos años.</text:p>
      <text:p text:style-name="Text_20_body">Si estás pensando en empezar una colección o simplemente quieres conocer mejor este hobby, merece la pena entender qué ofrece cada una.</text:p>
      <text:h text:style-name="Heading_20_2" text:outline-level="2">Panini: la colección que marcó a varias generaciones</text:h>
      <text:p text:style-name="Text_20_body">Hablar de cromos de fútbol es hablar de Panini.</text:p>
      <text:p text:style-name="Text_20_body">Durante décadas ha sido la referencia para millones de coleccionistas. Sus álbumes oficiales de la Liga española, los Mundiales o la Eurocopa forman parte de la infancia de varias generaciones.</text:p>
      <text:p text:style-name="Text_20_body">La fórmula apenas ha cambiado porque sigue funcionando. Un álbum, sobres cerrados, cientos de cromos por descubrir y un objetivo muy claro: completar la colección.</text:p>
      <text:p text:style-name="Text_20_body">Precisamente esa sencillez explica gran parte de su éxito. No hace falta conocer reglas ni aprender a jugar. Basta con disfrutar del proceso de abrir sobres, pegar cromos e intentar conseguir los que faltan.</text:p>
      <text:p text:style-name="Text_20_body">Además, Panini ha sabido mantener ese componente nostálgico que hace que muchos adultos vuelvan a comprar un álbum cada temporada, esta vez junto a sus hijos.</text:p>
      <text:h text:style-name="Heading_20_2" text:outline-level="2">Topps ha llegado para quedarse</text:h>
      <text:p text:style-name="Text_20_body">Durante muchos años Panini apenas tuvo competencia en Europa, pero eso ha cambiado.</text:p>
      <text:p text:style-name="Text_20_body">Topps ha ganado protagonismo gracias a licencias muy importantes y a colecciones centradas especialmente en competiciones internacionales. De hecho, el próximo álbum del mundial 2030 será a través de Topps.</text:p>
      <text:p text:style-name="Text_20_body"/>
      <text:p text:style-name="Text_20_body">Mientras que algunas colecciones de Panini mantienen un formato muy tradicional, Topps suele apostar por diseños más modernos, acabados especiales y cartas con un componente más cercano al coleccionismo premium.</text:p>
      <text:p text:style-name="Text_20_body">No significa que una sea mejor que otra.</text:p>
      <text:p text:style-name="Text_20_body">Simplemente ofrecen experiencias distintas.</text:p>
      <text:p text:style-name="Text_20_body">Hay aficionados que completan álbumes Panini cada temporada y otros que prefieren centrarse en las colecciones de Topps.</text:p>
      <text:p text:style-name="Text_20_body"><text:soft-page-break/>Y cada vez es más habitual encontrar coleccionistas que disfrutan de ambas.</text:p>
      <text:h text:style-name="Heading_20_2" text:outline-level="2">Cuando los cromos se convierten en cartas</text:h>
      <text:p text:style-name="Text_20_body">Si hace unos años alguien hablaba de coleccionar fútbol, todos pensábamos en un álbum.</text:p>
      <text:p text:style-name="Text_20_body">Hoy ya no es así.</text:p>
      <text:p text:style-name="Text_20_body">Colecciones como Adrenalyn XL o Match Attax han cambiado la forma de entender el coleccionismo deportivo.</text:p>
      <text:p text:style-name="Text_20_body">En lugar de pegar cromos en un álbum, los aficionados coleccionan cartas con diferentes niveles de rareza, estadísticas de los jugadores y diseños mucho más llamativos.</text:p>
      <text:p text:style-name="Text_20_body">Muchas personas empiezan simplemente por coleccionarlas.</text:p>
      <text:p text:style-name="Text_20_body">Otras terminan utilizándolas también para jugar.</text:p>
      <text:p text:style-name="Text_20_body">Ese componente hace que la experiencia sea diferente a la de un álbum clásico.</text:p>
      <text:h text:style-name="Heading_20_2" text:outline-level="2">¿Qué colección elegir?</text:h>
      <text:p text:style-name="Text_20_body">No existe una respuesta correcta.</text:p>
      <text:p text:style-name="Text_20_body">Depende mucho de lo que estés buscando.</text:p>
      <text:p text:style-name="Text_20_body">Si disfrutas completando un álbum y quieres revivir la experiencia de siempre, probablemente Panini siga siendo la mejor opción.</text:p>
      <text:p text:style-name="Text_20_body">Si prefieres cartas con acabados especiales y diseños más modernos, Topps puede resultar más atractiva.</text:p>
      <text:p text:style-name="Text_20_body">Y si además te gusta competir o intercambiar cartas con diferentes niveles de rareza, colecciones como Adrenalyn XL o Match Attax ofrecen una experiencia distinta.</text:p>
      <text:p text:style-name="Text_20_body">Lo importante no es elegir la mejor colección.</text:p>
      <text:p text:style-name="Text_20_body">Es elegir aquella que realmente vas a disfrutar.</text:p>
      <text:h text:style-name="Heading_20_2" text:outline-level="2">El verdadero reto empieza cuando aparecen los repetidos</text:h>
      <text:p text:style-name="Text_20_body">Hay una escena que se repite cada temporada.</text:p>
      <text:p text:style-name="Text_20_body">Los primeros sobres son emocionantes.</text:p>
      <text:p text:style-name="Text_20_body">Después llega el momento en que empiezan a aparecer los mismos jugadores una y otra vez.</text:p>
      <text:p text:style-name="Text_20_body">Muchos coleccionistas piensan que la única solución es seguir comprando sobres.</text:p>
      <text:p text:style-name="Text_20_body">En realidad, ahí es cuando empieza la parte más interesante del hobby.</text:p>
      <text:p text:style-name="Text_20_body">Los cromos repetidos dejan de ser un problema para convertirse en una oportunidad.</text:p>
      <text:p text:style-name="Text_20_body">Cada uno de ellos puede ser exactamente el que necesita otra persona.</text:p>
      <text:p text:style-name="Text_20_body">Y esa persona puede tener justo el que falta en tu colección.</text:p>
      <text:p text:style-name="Text_20_body">Es el motivo por el que el intercambio sigue siendo una parte tan importante del coleccionismo.</text:p>
      <text:h text:style-name="Heading_20_2" text:outline-level="2">Internet ha cambiado las reglas del juego</text:h>
      <text:p text:style-name="Text_20_body">Hace veinte años completar un álbum dependía mucho de la suerte y del número de amigos que hicieran la misma colección.</text:p>
      <text:p text:style-name="Text_20_body"><text:soft-page-break/>Hoy el panorama es completamente diferente.</text:p>
      <text:p text:style-name="Text_20_body">Las redes sociales, los grupos especializados y las aplicaciones para coleccionistas permiten contactar con personas de cualquier parte del país.</text:p>
      <text:p text:style-name="Text_20_body">Eso hace que completar una colección resulte mucho más sencillo que antes.</text:p>
      <text:p text:style-name="Text_20_body">Ya no hace falta esperar al recreo del colegio o al mercadillo del domingo para encontrar un intercambio.</text:p>
      <text:p text:style-name="Text_20_body">En muchos casos basta con tener actualizada la lista de cromos repetidos y la de los que todavía faltan.</text:p>
      <text:h text:style-name="Heading_20_2" text:outline-level="2">¿Merece la pena empezar una colección hoy?</text:h>
      <text:p text:style-name="Text_20_body">La respuesta es sí.</text:p>
      <text:p text:style-name="Text_20_body">No solo por el objetivo de completar un álbum.</text:p>
      <text:p text:style-name="Text_20_body">También por todo lo que ocurre durante el camino.</text:p>
      <text:p text:style-name="Text_20_body">Las conversaciones con otros aficionados.</text:p>
      <text:p text:style-name="Text_20_body">La búsqueda de ese cromo que parece imposible de encontrar.</text:p>
      <text:p text:style-name="Text_20_body">La satisfacción de pegar el último que faltaba.</text:p>
      <text:p text:style-name="Text_20_body">Y, cómo no, esa pequeña ilusión que sigue apareciendo cada vez que se abre un sobre nuevo.</text:p>
      <text:p text:style-name="Text_20_body">Quizá por eso las colecciones de fútbol siguen teniendo tanto éxito generación tras generación.</text:p>
      <text:p text:style-name="Text_20_body">Porque, aunque cambien los jugadores, los diseños o las marcas, la sensación de completar una colección sigue siendo exactamente la misma.</text:p>
      <text:p text:style-name="Text_20_body">Y cuando llega ese momento en el que solo faltan unos pocos cromos, el verdadero protagonista deja de ser el sobre que compras y pasa a ser el siguiente intercambio que consigu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Pujol</meta:initial-creator>
    <meta:creation-date>2026-06-26T12:07:32.58</meta:creation-date>
    <meta:document-statistic meta:table-count="0" meta:image-count="0" meta:object-count="0" meta:page-count="3" meta:paragraph-count="63" meta:word-count="959" meta:character-count="5972"/>
    <dc:date>2026-06-26T12:09:13.17</dc:date>
    <dc:creator>Alberto Pujol</dc:creator>
    <meta:editing-duration>PT1M41S</meta:editing-duration>
    <meta:editing-cycles>1</meta:editing-cycles>
    <meta:generator>OpenOffice/4.1.14$Win32 OpenOffice.org_project/4114m1$Build-9811</meta:generator>
  </office:meta>
</office:document-meta>
</file>
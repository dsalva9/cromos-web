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Bullet" style:list-style-name="L1"/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08880366074702912" text:style-name="Outline">
        <text:list-item>
          <text:p text:style-name="P2">Cómo intercambiar cromos y completar tu colección</text:p>
        </text:list-item>
      </text:list>
      <text:p text:style-name="Standard">Hay un momento que todos los coleccionistas terminan viviendo. Al principio cada sobre trae novedades, pero poco a poco empiezan a aparecer más cromos repetidos que nuevos. Es justo ahí cuando muchos cometen el mismo error: seguir comprando sobres esperando que la suerte cambie. En realidad, existe una forma mucho más inteligente de completar una colección: intercambiar.</text:p>
      <text:list xml:id="list31767396" text:continue-numbering="true" text:style-name="Outline">
        <text:list-item>
          <text:list>
            <text:list-item>
              <text:h text:style-name="Heading_20_2" text:outline-level="2">No se trata de comprar más, sino de comprar mejor</text:h>
            </text:list-item>
          </text:list>
        </text:list-item>
      </text:list>
      <text:p text:style-name="Standard">Comprar sobres forma parte de la diversión, pero deja de ser la estrategia más eficiente cuando el álbum está avanzado. Cada repetido tiene un valor que muchas veces pasa desapercibido: puede convertirse en el cromo que otra persona necesita. Y, a cambio, esa persona puede tener justo el que falta en tu colección.</text:p>
      <text:list xml:id="list31765636" text:continue-numbering="true" text:style-name="Outline">
        <text:list-item>
          <text:list>
            <text:list-item>
              <text:h text:style-name="Heading_20_2" text:outline-level="2">El primer paso es organizar lo que ya tienes</text:h>
            </text:list-item>
          </text:list>
        </text:list-item>
      </text:list>
      <text:p text:style-name="Standard">Antes de buscar intercambios, merece la pena dedicar unos minutos a revisar la colección. Lo ideal es mantener dos listas actualizadas: los cromos repetidos y los cromos que todavía faltan. Da igual si utilizas una libreta, una hoja de cálculo o una aplicación; lo importante es que la información esté al día.</text:p>
      <text:list xml:id="list31754110" text:continue-numbering="true" text:style-name="Outline">
        <text:list-item>
          <text:list>
            <text:list-item>
              <text:h text:style-name="Heading_20_2" text:outline-level="2">¿Dónde puedes intercambiar cromos?</text:h>
            </text:list-item>
          </text:list>
        </text:list-item>
      </text:list>
      <text:p text:style-name="Standard">Las posibilidades han cambiado mucho en los últimos años. Antes casi todo ocurría en el colegio o en mercadillos. Hoy también existen grupos en redes sociales, comunidades de coleccionistas y aplicaciones especializadas.<text:line-break/><text:line-break/>Cada opción tiene ventajas. Los intercambios presenciales permiten revisar el estado de los cromos, mientras que las plataformas digitales como <text:span text:style-name="T1">CambioCromos</text:span> amplían enormemente el número de personas con las que puedes contactar.</text:p>
      <text:list xml:id="list31757424" text:continue-numbering="true" text:style-name="Outline">
        <text:list-item>
          <text:list>
            <text:list-item>
              <text:h text:style-name="Heading_20_2" text:outline-level="2">Qué hace que un intercambio sea bueno</text:h>
            </text:list-item>
          </text:list>
        </text:list-item>
      </text:list>
      <text:p text:style-name="Standard">Un buen intercambio no consiste en 'ganar'. Consiste en que las dos personas consigan acercarse a completar su colección. En la mayoría de álbumes los cromos normales se intercambian uno por uno. Cuando aparecen cartas o cromos especiales, lo más importante es que ambas partes estén de acuerdo con el valor del intercambio.</text:p>
      <text:list xml:id="list31775032" text:continue-numbering="true" text:style-name="Outline">
        <text:list-item>
          <text:list>
            <text:list-item>
              <text:h text:style-name="Heading_20_2" text:outline-level="2">Cuando el intercambio es a distancia</text:h>
            </text:list-item>
          </text:list>
        </text:list-item>
      </text:list>
      <text:p text:style-name="Standard">Si envías cromos por correo, protégelos entre dos trozos de cartón para evitar dobleces Confirma siempre el listado antes del envío y utiliza fundas si se trata de cartas de mayor valor. Son pequeños detalles que evitan la mayoría de problemas.</text:p>
      <text:list xml:id="list31756427" text:continue-numbering="true" text:style-name="Outline">
        <text:list-item>
          <text:list>
            <text:list-item>
              <text:h text:style-name="Heading_20_2" text:outline-level="2">Errores que merece la pena evitar</text:h>
            </text:list-item>
          </text:list>
        </text:list-item>
      </text:list>
      <text:list xml:id="list7762207431581444585" text:style-name="L1">
        <text:list-item>
          <text:p text:style-name="P1">Seguir comprando sobres cuando solo faltan unos pocos cromos.</text:p>
        </text:list-item>
        <text:list-item>
          <text:p text:style-name="P1"><text:soft-page-break/>No actualizar la lista de repetidos después de un intercambio.</text:p>
        </text:list-item>
        <text:list-item>
          <text:p text:style-name="P1">Guardar todos los repetidos sin intentar aprovecharlos.</text:p>
        </text:list-item>
        <text:list-item>
          <text:p text:style-name="P1">Pensar que nadie tendrá el cromo que te falta solo porque hoy no aparece.</text:p>
        </text:list-item>
      </text:list>
      <text:list xml:id="list31768644" text:continue-list="list31756427" text:style-name="Outline">
        <text:list-item>
          <text:list>
            <text:list-item>
              <text:h text:style-name="Heading_20_2" text:outline-level="2">La tecnología también forma parte del hobby</text:h>
            </text:list-item>
          </text:list>
        </text:list-item>
      </text:list>
      <text:p text:style-name="Standard">Hace unos años encontrar un intercambio implicaba revisar cientos de mensajes en foros o grupos de Facebook. Hoy es posible registrar los cromos que tienes y los que buscas para encontrar coincidencias de forma mucho más rápida. No sustituye la parte social del coleccionismo, pero sí elimina muchas horas de búsqueda.</text:p>
      <text:list xml:id="list31767537" text:continue-numbering="true" text:style-name="Outline">
        <text:list-item>
          <text:list>
            <text:list-item>
              <text:h text:style-name="Heading_20_2" text:outline-level="2">Al final, todo consiste en encontrar a la persona adecuada</text:h>
            </text:list-item>
          </text:list>
        </text:list-item>
      </text:list>
      <text:p text:style-name="Standard">Completar una colección rara vez depende únicamente de la suerte. La organización, la paciencia y los intercambios marcan la diferencia. Si ya sabes qué cromos puedes ofrecer y cuáles necesitas, el siguiente paso es localizar a otros coleccionistas con intereses compatibles. Herramientas como CambioCromos nacen precisamente para facilitar ese proceso, permitiendo dedicar menos tiempo a buscar y más a disfrutar del propio hobb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6-06-26T11:48:23.30</dc:date>
    <meta:editing-duration>P0D</meta:editing-duration>
    <meta:generator>OpenOffice/4.1.14$Win32 OpenOffice.org_project/4114m1$Build-9811</meta:generator>
    <meta:document-statistic meta:table-count="0" meta:image-count="0" meta:object-count="0" meta:page-count="2" meta:paragraph-count="21" meta:word-count="545" meta:character-count="3405"/>
    <dc:creator>Alberto Pujol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
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ómo empezar una colección de cromos o cartas sin cometer los errores más habituales</text:h>
      <text:p text:style-name="Text_20_body">Hay personas que empiezan una colección porque su hijo les pide un álbum al pasar por un quiosco.</text:p>
      <text:p text:style-name="Text_20_body">Otras vuelven al hobby después de veinte años, movidas por la nostalgia.</text:p>
      <text:p text:style-name="Text_20_body">Y también están quienes descubren las cartas Pokémon, Magic o Lorcana gracias a un amigo y terminan completamente enganchados.</text:p>
      <text:p text:style-name="Text_20_body">El motivo cambia. Lo que suele ser igual es la primera sensación.</text:p>
      <text:p text:style-name="Text_20_body"><text:span text:style-name="Strong_20_Emphasis">No saber por dónde empezar.</text:span></text:p>
      <text:p text:style-name="Text_20_body">¿Compro sobres? ¿Necesito un álbum? ¿Es mejor intercambiar? ¿Merece la pena comprar cartas sueltas? ¿Tengo que elegir una única colección?</text:p>
      <text:p text:style-name="Text_20_body">La buena noticia es que no existe una única forma de convertirse en coleccionista.</text:p>
      <text:p text:style-name="Text_20_body">La mala es que casi todos cometemos los mismos errores durante las primeras semanas.</text:p>
      <text:h text:style-name="Heading_20_2" text:outline-level="2">El primer error es querer hacerlo todo</text:h>
      <text:p text:style-name="Text_20_body">Cuando descubres este mundo resulta fácil entusiasmarse.</text:p>
      <text:p text:style-name="Text_20_body">Empiezas mirando una colección de fútbol y, antes de darte cuenta, también te llaman la atención las cartas Pokémon, una expansión de Lorcana y algún vídeo sobre Magic.</text:p>
      <text:p text:style-name="Text_20_body">No hay nada malo en sentir curiosidad.</text:p>
      <text:p text:style-name="Text_20_body">El problema aparece cuando intentas seguir todas las colecciones al mismo tiempo.</text:p>
      <text:p text:style-name="Text_20_body">Además del dinero que supone, terminarás sintiendo que nunca avanzas realmente en ninguna.</text:p>
      <text:p text:style-name="Text_20_body">Por eso casi todos los coleccionistas recomiendan lo mismo: empieza por una sola colección.</text:p>
      <text:p text:style-name="Text_20_body">Cuando la conozcas bien, siempre habrá tiempo para explorar otras.</text:p>
      <text:h text:style-name="Heading_20_2" text:outline-level="2">No necesitas gastar mucho dinero para disfrutar</text:h>
      <text:p text:style-name="Text_20_body">Existe la idea de que coleccionar es una afición cara.</text:p>
      <text:p text:style-name="Text_20_body">Puede llegar a serlo.</text:p>
      <text:p text:style-name="Text_20_body">Pero no tiene por qué.</text:p>
      <text:p text:style-name="Text_20_body">La diferencia suele estar en cómo compras.</text:p>
      <text:p text:style-name="Text_20_body">Abrir sobres es divertido y forma parte del hobby, pero eso no significa que debas comprar sin un límite.</text:p>
      <text:p text:style-name="Text_20_body">Marcar un presupuesto mensual ayuda a disfrutar mucho más de la colección y evita esa sensación de estar gastando más de la cuenta.</text:p>
      <text:p text:style-name="Text_20_body">Curiosamente, quienes más tiempo llevan coleccionando suelen comprar menos sobres que los principiantes.</text:p>
      <text:p text:style-name="Text_20_body">Simplemente han aprendido cuándo merece la pena hacerlo.</text:p>
      <text:h text:style-name="Heading_20_2" text:outline-level="2"><text:soft-page-break/>Los repetidos llegarán antes de lo que imaginas</text:h>
      <text:p text:style-name="Text_20_body">Da igual la colección que elijas.</text:p>
      <text:p text:style-name="Text_20_body">Sucederá.</text:p>
      <text:p text:style-name="Text_20_body">Al principio apenas aparecen.</text:p>
      <text:p text:style-name="Text_20_body">Después empiezan a repetirse algunos números.</text:p>
      <text:p text:style-name="Text_20_body">Y llega un momento en el que tienes una pequeña pila de cromos o cartas que ya no sabes dónde guardar.</text:p>
      <text:p text:style-name="Text_20_body">Muchos principiantes los consideran un fracaso.</text:p>
      <text:p text:style-name="Text_20_body">Los coleccionistas con experiencia los ven como una oportunidad.</text:p>
      <text:p text:style-name="Text_20_body">Cada repetido es una posibilidad de conseguir aquello que todavía falta.</text:p>
      <text:p text:style-name="Text_20_body">Por eso merece la pena conservarlos bien desde el primer día.</text:p>
      <text:h text:style-name="Heading_20_2" text:outline-level="2">No colecciones solo pensando en el valor</text:h>
      <text:p text:style-name="Text_20_body">Internet está lleno de noticias sobre cartas vendidas por miles de euros.</text:p>
      <text:p text:style-name="Text_20_body">Es fácil pensar que todas las colecciones acabarán revalorizándose.</text:p>
      <text:p text:style-name="Text_20_body">La realidad es bastante diferente.</text:p>
      <text:p text:style-name="Text_20_body">Algunas piezas alcanzan precios muy elevados.</text:p>
      <text:p text:style-name="Text_20_body">La inmensa mayoría no.</text:p>
      <text:p text:style-name="Text_20_body">Si empiezas una colección únicamente como inversión, es posible que acabes decepcionado.</text:p>
      <text:p text:style-name="Text_20_body">En cambio, si eliges una colección porque realmente te gusta, el tiempo jugará a tu favor.</text:p>
      <text:p text:style-name="Text_20_body">Si algún día aumenta de valor, estupendo.</text:p>
      <text:p text:style-name="Text_20_body">Y si no ocurre, seguirás disfrutando de una colección que construiste poco a poco.</text:p>
      <text:h text:style-name="Heading_20_2" text:outline-level="2">Organizar la colección desde el principio marca la diferencia</text:h>
      <text:p text:style-name="Text_20_body">Hay una frase que muchos coleccionistas repiten con el tiempo:</text:p>
      <text:p text:style-name="Text_20_body"><text:span text:style-name="Emphasis">"Ojalá hubiera empezado a organizarlo todo desde el primer día."</text:span></text:p>
      <text:p text:style-name="Text_20_body">Cuando la colección todavía es pequeña, parece innecesario.</text:p>
      <text:p text:style-name="Text_20_body">Pero conforme pasan las semanas empiezan los problemas.</text:p>
      <text:p text:style-name="Text_20_body">No recuerdas qué cromos tienes repetidos.</text:p>
      <text:p text:style-name="Text_20_body">Pierdes tiempo buscando una carta concreta.</text:p>
      <text:p text:style-name="Text_20_body">Olvidas qué números te faltan.</text:p>
      <text:p text:style-name="Text_20_body">Un poco de organización evita todo eso.</text:p>
      <text:p text:style-name="Text_20_body">Y, además, hace mucho más sencillos los intercambios.</text:p>
      <text:h text:style-name="Heading_20_2" text:outline-level="2">Habla con otros coleccionistas</text:h>
      <text:p text:style-name="Text_20_body">Una colección puede hacerse perfectamente en solitario.</text:p>
      <text:p text:style-name="Text_20_body">Pero cambia por completo cuando empiezas a compartirla.</text:p>
      <text:p text:style-name="Text_20_body"><text:soft-page-break/>Descubrirás personas que llevan años coleccionando, aprenderás pequeños trucos y conocerás colecciones que probablemente nunca habías visto.</text:p>
      <text:p text:style-name="Text_20_body">También descubrirás algo curioso.</text:p>
      <text:p text:style-name="Text_20_body">Da igual la edad que tenga cada persona.</text:p>
      <text:p text:style-name="Text_20_body">Cuando dos coleccionistas hablan de sus álbumes o de sus cartas favoritas, todos parecen volver a tener diez años.</text:p>
      <text:h text:style-name="Heading_20_2" text:outline-level="2">No tengas prisa por terminar</text:h>
      <text:p text:style-name="Text_20_body">Es quizá el mejor consejo de todos.</text:p>
      <text:p text:style-name="Text_20_body">Completar una colección produce una satisfacción enorme.</text:p>
      <text:p text:style-name="Text_20_body">Pero si conviertes ese objetivo en una obsesión, corres el riesgo de perderte la parte más divertida.</text:p>
      <text:p text:style-name="Text_20_body">Abrir sobres.</text:p>
      <text:p text:style-name="Text_20_body">Intercambiar.</text:p>
      <text:p text:style-name="Text_20_body">Descubrir nuevos diseños.</text:p>
      <text:p text:style-name="Text_20_body">Conocer gente.</text:p>
      <text:p text:style-name="Text_20_body">Esperar esa carta que parece imposible de encontrar.</text:p>
      <text:p text:style-name="Text_20_body">Todo eso también forma parte de la colección.</text:p>
      <text:p text:style-name="Text_20_body">Y, cuando por fin colocas el último cromo o la última carta, te das cuenta de algo curioso.</text:p>
      <text:p text:style-name="Text_20_body">Lo que realmente echabas de menos no era el hueco vacío del álbum.</text:p>
      <text:p text:style-name="Text_20_body">Era todo el camino que te había llevado hasta allí.</text:p>
      <text:p text:style-name="Text_20_body">Porque las mejores colecciones no son las que se completan más rápido.</text:p>
      <text:p text:style-name="Text_20_body">Son las que dejan más recuerdos por el camin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6-26T12:27:21.55</meta:creation-date>
    <meta:document-statistic meta:table-count="0" meta:image-count="0" meta:object-count="0" meta:page-count="3" meta:paragraph-count="78" meta:word-count="763" meta:character-count="4756"/>
    <dc:date>2026-06-26T12:28:25.11</dc:date>
    <dc:creator>Alberto Pujol</dc:creator>
    <meta:editing-duration>PT1M4S</meta:editing-duration>
    <meta:editing-cycles>1</meta:editing-cycles>
    <meta:generator>OpenOffice/4.1.14$Win32 OpenOffice.org_project/4114m1$Build-9811</meta:generator>
  </office:meta>
</office:document-meta>
</file>
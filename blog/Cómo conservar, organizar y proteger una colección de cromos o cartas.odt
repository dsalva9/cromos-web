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ómo conservar, organizar y proteger una colección de cromos o cartas</text:h>
      <text:p text:style-name="Text_20_body">Hay un momento que muchos coleccionistas recuerdan con cierta tristeza.</text:p>
      <text:p text:style-name="Text_20_body">Abres una caja que llevaba años guardada en un armario, sacas aquel álbum que tanto esfuerzo costó completar... y descubres que algunos cromos están despegados, las esquinas se han doblado o el papel ha empezado a amarillear.</text:p>
      <text:p text:style-name="Text_20_body">No ocurre de un día para otro.</text:p>
      <text:p text:style-name="Text_20_body">Las colecciones envejecen poco a poco, casi siempre por pequeños descuidos que parecen insignificantes cuando empiezas.</text:p>
      <text:p text:style-name="Text_20_body">La buena noticia es que la mayoría de esos problemas pueden evitarse con unos hábitos muy sencillos.</text:p>
      <text:h text:style-name="Heading_20_2" text:outline-level="2">Una colección bien cuidada dura muchos años</text:h>
      <text:p text:style-name="Text_20_body">No hace falta tener cromos antiguos o cartas especialmente valiosas para preocuparse por su conservación.</text:p>
      <text:p text:style-name="Text_20_body">De hecho, cuanto antes adquieras buenos hábitos, menos problemas tendrás en el futuro.</text:p>
      <text:p text:style-name="Text_20_body">El papel es un material delicado. La humedad, la luz directa del sol o los cambios bruscos de temperatura terminan pasando factura.</text:p>
      <text:p text:style-name="Text_20_body">Por eso conviene buscar un lugar seco, limpio y alejado de ventanas donde guardar tanto los álbumes como las cajas o archivadores.</text:p>
      <text:p text:style-name="Text_20_body">No hace falta convertir una habitación en un museo.</text:p>
      <text:p text:style-name="Text_20_body">Simplemente evitar aquellos lugares donde las condiciones cambian constantemente.</text:p>
      <text:h text:style-name="Heading_20_2" text:outline-level="2">El mayor enemigo suele estar en nuestras manos</text:h>
      <text:p text:style-name="Text_20_body">Muchas personas piensan inmediatamente en la humedad.</text:p>
      <text:p text:style-name="Text_20_body">Sin embargo, el uso diario provoca más daños de los que imaginamos.</text:p>
      <text:p text:style-name="Text_20_body">Pasar las páginas demasiado deprisa, apoyar objetos encima del álbum o manipular las cartas mientras comemos son pequeños gestos que terminan dejando marcas permanentes.</text:p>
      <text:p text:style-name="Text_20_body">No significa que haya que tratar la colección con miedo.</text:p>
      <text:p text:style-name="Text_20_body">Solo merece la pena dedicarle el mismo cuidado que tendríamos con un libro al que apreciamos.</text:p>
      <text:h text:style-name="Heading_20_2" text:outline-level="2">¿Álbumes, cajas o archivadores?</text:h>
      <text:p text:style-name="Text_20_body">No existe un único sistema perfecto.</text:p>
      <text:p text:style-name="Text_20_body">Cada coleccionista acaba encontrando el suyo.</text:p>
      <text:p text:style-name="Text_20_body">Los álbumes son la opción natural cuando la colección ha sido diseñada para completarse de esa manera.</text:p>
      <text:p text:style-name="Text_20_body">Las cartas, en cambio, suelen conservarse mejor en archivadores con fundas específicas.</text:p>
      <text:p text:style-name="Text_20_body">Quienes participan en varias colecciones al mismo tiempo también utilizan cajas clasificadoras para <text:soft-page-break/>guardar repetidos o cartas pendientes de intercambiar.</text:p>
      <text:p text:style-name="Text_20_body">Lo importante no es el sistema.</text:p>
      <text:p text:style-name="Text_20_body">Lo importante es que te resulte fácil encontrar cualquier pieza sin tener que manipular continuamente toda la colección.</text:p>
      <text:h text:style-name="Heading_20_2" text:outline-level="2">Las fundas no son solo para cartas caras</text:h>
      <text:p text:style-name="Text_20_body">Existe la idea de que las <text:a xlink:type="simple" xlink:href="https://amzn.to/4oPA0at" text:style-name="Internet_20_link" text:visited-style-name="Visited_20_Internet_20_Link">fundas protectoras</text:a> solo merecen la pena cuando una carta vale mucho dinero.</text:p>
      <text:p text:style-name="Text_20_body">En realidad, cualquier carta que quieras conservar durante años agradecerá esa protección extra.</text:p>
      <text:p text:style-name="Text_20_body">Las fundas ayudan a evitar arañazos, desgaste en las esquinas y marcas provocadas por el uso.</text:p>
      <text:p text:style-name="Text_20_body">No convierten una carta en indestructible, pero sí reducen considerablemente el riesgo de deterioro.</text:p>
      <text:h text:style-name="Heading_20_2" text:outline-level="2">Organizar bien una colección también ayuda a disfrutarla</text:h>
      <text:p text:style-name="Text_20_body">Hay coleccionistas que ordenan sus cartas por expansión.</text:p>
      <text:p text:style-name="Text_20_body">Otros prefieren hacerlo por número, por personaje o incluso por rareza.</text:p>
      <text:p text:style-name="Text_20_body">No existe una norma.</text:p>
      <text:p text:style-name="Text_20_body">La mejor organización es aquella que te permite encontrar una carta en pocos segundos.</text:p>
      <text:p text:style-name="Text_20_body">Además, mantener un orden facilita muchísimo los intercambios.</text:p>
      <text:p text:style-name="Text_20_body">Cuando alguien pregunta si tienes una carta concreta, la respuesta llega mucho más rápido.</text:p>
      <text:p text:style-name="Text_20_body">Y eso evita tener que revisar una caja llena de repetidos cada vez.</text:p>
      <text:h text:style-name="Heading_20_2" text:outline-level="2">Los repetidos también merecen un sitio</text:h>
      <text:p text:style-name="Text_20_body">Es habitual dedicar toda la atención al álbum principal y olvidar completamente los repetidos.</text:p>
      <text:p text:style-name="Text_20_body">Con el tiempo terminan mezclados, doblados o incluso perdidos.</text:p>
      <text:p text:style-name="Text_20_body">Sin embargo, esos repetidos son precisamente la mejor herramienta para seguir ampliando la colección.</text:p>
      <text:p text:style-name="Text_20_body">Mantenerlos clasificados permite preparar intercambios mucho más rápidamente y saber en todo momento qué puedes ofrecer a otros coleccionistas.</text:p>
      <text:h text:style-name="Heading_20_2" text:outline-level="2">Digitalizar la colección tiene más ventajas de las que parece</text:h>
      <text:p text:style-name="Text_20_body">Hace unos años la mayoría de personas llevaba el control con una libreta.</text:p>
      <text:p text:style-name="Text_20_body">Hoy es mucho más cómodo utilizar aplicaciones que permiten registrar los cromos o cartas disponibles.</text:p>
      <text:p text:style-name="Text_20_body">No sustituyen a la colección física.</text:p>
      <text:p text:style-name="Text_20_body">Simplemente ayudan a gestionarla.</text:p>
      <text:p text:style-name="Text_20_body">Además de saber qué piezas tienes, resulta mucho más sencillo controlar los repetidos y localizar aquello que todavía falta.</text:p>
      <text:p text:style-name="Text_20_body">Cuando participas en varias colecciones al mismo tiempo, esa diferencia se nota mucho.</text:p>
      <text:h text:style-name="Heading_20_2" text:outline-level="2"><text:soft-page-break/>¿Y si algún día quieres venderla?</text:h>
      <text:p text:style-name="Text_20_body">Aunque ahora no entre en tus planes, una colección bien conservada siempre tendrá más posibilidades de mantener su valor.</text:p>
      <text:p text:style-name="Text_20_body">Un álbum limpio, unas cartas protegidas y una organización cuidada transmiten confianza a cualquier comprador o coleccionista.</text:p>
      <text:p text:style-name="Text_20_body">No significa que debas pensar continuamente en el dinero.</text:p>
      <text:p text:style-name="Text_20_body">Simplemente demuestra que cuidar una colección nunca es tiempo perdido.</text:p>
      <text:h text:style-name="Heading_20_2" text:outline-level="2">Una colección cuenta una historia</text:h>
      <text:p text:style-name="Text_20_body">Con el paso de los años es fácil olvidar cuánto costó encontrar aquel último cromo o aquella carta que parecía imposible.</text:p>
      <text:p text:style-name="Text_20_body">Pero cuando vuelves a abrir el álbum, todos esos recuerdos aparecen otra vez.</text:p>
      <text:p text:style-name="Text_20_body">Por eso merece la pena dedicar unos minutos a conservar correctamente una colección.</text:p>
      <text:p text:style-name="Text_20_body">No solo estás protegiendo un montón de cromos o cartas.</text:p>
      <text:p text:style-name="Text_20_body">También estás guardando una parte de tu historia como coleccionist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Pujol</meta:initial-creator>
    <meta:creation-date>2026-06-26T12:24:44.02</meta:creation-date>
    <meta:document-statistic meta:table-count="0" meta:image-count="0" meta:object-count="0" meta:page-count="3" meta:paragraph-count="63" meta:word-count="785" meta:character-count="5067"/>
    <dc:date>2026-06-26T12:26:42.95</dc:date>
    <dc:creator>Alberto Pujol</dc:creator>
    <meta:editing-duration>PT1M59S</meta:editing-duration>
    <meta:editing-cycles>1</meta:editing-cycles>
    <meta:generator>OpenOffice/4.1.14$Win32 OpenOffice.org_project/4114m1$Build-9811</meta:generator>
  </office:meta>
</office:document-meta>
</file>
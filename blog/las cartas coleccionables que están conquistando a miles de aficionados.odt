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s cartas coleccionables que están conquistando a miles de aficionados</text:h>
      <text:p text:style-name="Text_20_body">Durante muchos años, hablar de cartas coleccionables era hablar de Pokémon o, como mucho, de Magic: The Gathering. Sin embargo, en los últimos tiempos el panorama ha cambiado por completo.</text:p>
      <text:p text:style-name="Text_20_body">Hoy existen decenas de juegos de cartas coleccionables con comunidades enormes, ilustraciones espectaculares y miles de aficionados intercambiando, comprando y ampliando sus colecciones.</text:p>
      <text:p text:style-name="Text_20_body">Algunas personas llegan atraídas por el juego. Otras nunca aprenden las reglas y simplemente disfrutan reuniendo las cartas.</text:p>
      <text:p text:style-name="Text_20_body">Sea cual sea el motivo, una cosa está clara: vivimos uno de los mejores momentos para empezar una colección.</text:p>
      <text:h text:style-name="Heading_20_2" text:outline-level="2">El fenómeno Pokémon</text:h>
      <text:p text:style-name="Text_20_body">Resulta imposible empezar por otro sitio.</text:p>
      <text:p text:style-name="Text_20_body">Más de veinticinco años después de su lanzamiento, Pokémon sigue siendo la referencia para millones de coleccionistas en todo el mundo.</text:p>
      <text:p text:style-name="Text_20_body">Cada nueva expansión despierta el interés de veteranos y de personas que nunca habían comprado una carta.</text:p>
      <text:p text:style-name="Text_20_body">Parte de su éxito está en esa mezcla entre nostalgia y renovación constante. Los personajes siguen siendo reconocibles, pero las ilustraciones, mecánicas y rarezas evolucionan con cada colección.</text:p>
      <text:p text:style-name="Text_20_body">Hoy es fácil encontrar personas que empezaron coleccionando de niños y han vuelto muchos años después para continuar donde lo dejaron.</text:p>
      <text:h text:style-name="Heading_20_2" text:outline-level="2">Magic: mucho más que un juego</text:h>
      <text:p text:style-name="Text_20_body">Aunque nació como un juego de estrategia, Magic: The Gathering lleva décadas siendo también un objeto de colección.</text:p>
      <text:p text:style-name="Text_20_body">Existen cartas con ilustraciones muy cotizadas, ediciones limitadas y expansiones que marcaron una época.</text:p>
      <text:p text:style-name="Text_20_body">Muchos aficionados nunca llegan a competir en torneos.</text:p>
      <text:p text:style-name="Text_20_body">Simplemente disfrutan descubriendo nuevas cartas, organizando sus carpetas o completando determinadas colecciones.</text:p>
      <text:p text:style-name="Text_20_body">Es una afición mucho más amplia de lo que parece a primera vista.</text:p>
      <text:h text:style-name="Heading_20_2" text:outline-level="2">Disney Lorcana, el recién llegado que ha sorprendido a todos</text:h>
      <text:p text:style-name="Text_20_body">Pocas personas esperaban que una colección tan reciente consiguiera generar tanta expectación.</text:p>
      <text:p text:style-name="Text_20_body">Disney Lorcana reúne personajes clásicos de Disney con ilustraciones completamente nuevas y una calidad de impresión muy cuidada.</text:p>
      <text:p text:style-name="Text_20_body">Eso ha provocado que muchos aficionados al coleccionismo, incluso sin intención de jugar, hayan empezado a buscar determinadas cartas simplemente por su diseño.</text:p>
      <text:p text:style-name="Text_20_body"><text:soft-page-break/>Todo apunta a que seguirá creciendo durante los próximos años.</text:p>
      <text:h text:style-name="Heading_20_2" text:outline-level="2">One Piece también quiere su sitio</text:h>
      <text:p text:style-name="Text_20_body">El éxito del manga y del anime hacía pensar que tarde o temprano aparecería una colección importante de cartas.</text:p>
      <text:p text:style-name="Text_20_body">Y así ocurrió.</text:p>
      <text:p text:style-name="Text_20_body">One Piece Card Game ha conseguido crear una comunidad muy activa en muy poco tiempo.</text:p>
      <text:p text:style-name="Text_20_body">Las cartas destacan por su diseño y por la enorme cantidad de personajes disponibles, algo que hace especialmente atractiva la colección para quienes siguen la serie desde hace años.</text:p>
      <text:h text:style-name="Heading_20_2" text:outline-level="2">Yu-Gi-Oh!, una comunidad que nunca desapareció</text:h>
      <text:p text:style-name="Text_20_body">Puede que ya no aparezca tanto en los medios como hace dos décadas, pero Yu-Gi-Oh! sigue teniendo millones de seguidores.</text:p>
      <text:p text:style-name="Text_20_body">Su mercado de segunda mano continúa muy activo y todavía hoy aparecen nuevas expansiones y productos dirigidos tanto a jugadores como a coleccionistas.</text:p>
      <text:p text:style-name="Text_20_body">Es una de esas franquicias que ha sabido mantenerse viva generación tras generación.</text:p>
      <text:h text:style-name="Heading_20_2" text:outline-level="2">Dragon Ball, Digimon y muchas más</text:h>
      <text:p text:style-name="Text_20_body">El mundo de las cartas coleccionables no termina en las franquicias más conocidas.</text:p>
      <text:p text:style-name="Text_20_body">Dragon Ball Super Card Game, Digimon Card Game, Star Wars Unlimited, Altered y muchas otras colecciones siguen ampliando la oferta disponible.</text:p>
      <text:p text:style-name="Text_20_body">Cada una tiene su propia comunidad, su estilo artístico y una forma diferente de entender el coleccionismo.</text:p>
      <text:p text:style-name="Text_20_body">Eso hace que prácticamente cualquier aficionado pueda encontrar una colección con la que identificarse.</text:p>
      <text:h text:style-name="Heading_20_2" text:outline-level="2">¿Es necesario jugar para coleccionar?</text:h>
      <text:p text:style-name="Text_20_body">No.</text:p>
      <text:p text:style-name="Text_20_body">Y probablemente esa sea una de las dudas más frecuentes entre quienes empiezan.</text:p>
      <text:p text:style-name="Text_20_body">Hay personas que disfrutan jugando cada semana.</text:p>
      <text:p text:style-name="Text_20_body">Otras nunca llegan a aprender las reglas.</text:p>
      <text:p text:style-name="Text_20_body">Coleccionan porque les gustan las ilustraciones, porque quieren completar una expansión concreta o simplemente porque disfrutan organizando sus cartas.</text:p>
      <text:p text:style-name="Text_20_body">Ambas formas de vivir la afición son igual de válidas.</text:p>
      <text:h text:style-name="Heading_20_2" text:outline-level="2">El intercambio sigue siendo una parte esencial</text:h>
      <text:p text:style-name="Text_20_body">Da igual si coleccionas Pokémon, Magic, One Piece o Lorcana.</text:p>
      <text:p text:style-name="Text_20_body">Llega un momento en el que empiezan a aparecer cartas repetidas.</text:p>
      <text:p text:style-name="Text_20_body">Y ahí sucede exactamente lo mismo que con los álbumes de cromos.</text:p>
      <text:p text:style-name="Text_20_body"><text:soft-page-break/>Intercambiar resulta mucho más eficiente que seguir comprando sobres sin parar.</text:p>
      <text:p text:style-name="Text_20_body">Además, suele ser la forma más divertida de conocer a otros aficionados y descubrir nuevas colecciones.</text:p>
      <text:p text:style-name="Text_20_body">Hoy existen comunidades especializadas donde resulta sencillo encontrar personas con intereses parecidos, organizar intercambios e incluso llevar un control de las cartas que ya tienes y de las que todavía buscas.</text:p>
      <text:h text:style-name="Heading_20_2" text:outline-level="2">Nunca ha habido tantas opciones</text:h>
      <text:p text:style-name="Text_20_body">Hace apenas unos años parecía que todo giraba alrededor de dos o tres grandes nombres.</text:p>
      <text:p text:style-name="Text_20_body">Hoy el panorama es completamente distinto.</text:p>
      <text:p text:style-name="Text_20_body">Cada temporada aparecen nuevas colecciones, nuevos artistas y nuevas formas de disfrutar del coleccionismo.</text:p>
      <text:p text:style-name="Text_20_body">Eso puede resultar abrumador al principio, pero también significa que nunca ha sido tan fácil encontrar una colección que realmente encaje con tus gustos.</text:p>
      <text:p text:style-name="Text_20_body">Al final, da igual si prefieres Pokémon, Magic, One Piece o cualquier otra franquicia.</text:p>
      <text:p text:style-name="Text_20_body">Lo importante es que cada carta que añades a tu colección tenga un motivo para estar ahí.</text:p>
      <text:p text:style-name="Text_20_body">Y cuando empiezan a aparecer las primeras repetidas, siempre habrá otro coleccionista dispuesto a convertirlas en la siguiente pieza de tu colecció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Pujol</meta:initial-creator>
    <meta:creation-date>2026-06-26T12:19:37.06</meta:creation-date>
    <meta:document-statistic meta:table-count="0" meta:image-count="0" meta:object-count="0" meta:page-count="3" meta:paragraph-count="58" meta:word-count="822" meta:character-count="5371"/>
    <dc:date>2026-06-26T12:21:07.17</dc:date>
    <dc:creator>Alberto Pujol</dc:creator>
    <meta:editing-duration>PT1M30S</meta:editing-duration>
    <meta:editing-cycles>1</meta:editing-cycles>
    <meta:generator>OpenOffice/4.1.14$Win32 OpenOffice.org_project/4114m1$Build-9811</meta:generator>
  </office:meta>
</office:document-meta>
</file>
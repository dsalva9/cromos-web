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ocar cromos Panini em Portugal | Quando percebes que já não precisas comprar mais saquetas</text:h>
      <text:p text:style-name="Text_20_body"/>
      <text:p text:style-name="Text_20_body">O momento em que percebes que já não precisas comprar mais saquetas</text:p>
      <text:p text:style-name="Text_20_body">Há um momento que quase toda a gente que faz uma caderneta conhece.</text:p>
      <text:p text:style-name="Text_20_body">No início é entusiasmo.</text:p>
      <text:p text:style-name="Text_20_body">Compras algumas saquetas. Abres uma atrás da outra. Cada nova figurinha parece uma pequena vitória.</text:p>
      <text:p text:style-name="Text_20_body">A caderneta começa a ganhar forma.</text:p>
      <text:p text:style-name="Text_20_body">Mas depois acontece.</text:p>
      <text:p text:style-name="Text_20_body">Começas a olhar para a pilha de repetidos e percebes que alguma coisa mudou.</text:p>
      <text:p text:style-name="Text_20_body">Abres uma saqueta.</text:p>
      <text:p text:style-name="Text_20_body">Dois repetidos.</text:p>
      <text:p text:style-name="Text_20_body">Outra.</text:p>
      <text:p text:style-name="Text_20_body">Mais três.</text:p>
      <text:p text:style-name="Text_20_body">Mais uma.</text:p>
      <text:p text:style-name="Text_20_body">E voltam a aparecer jogadores que já tens.</text:p>
      <text:p text:style-name="Text_20_body">É nesse momento que muitos colecionadores descobrem que talvez o problema já não seja encontrar mais cromos.</text:p>
      <text:p text:style-name="Text_20_body">Talvez o problema seja encontrar as pessoas certas.</text:p>
      <text:p text:style-name="Horizontal_20_Line"/>
      <text:h text:style-name="Heading_20_2" text:outline-level="2">A falsa sensação de que falta comprar mais</text:h>
      <text:p text:style-name="Text_20_body">Quando faltam 200 cromos parece lógico continuar a comprar.</text:p>
      <text:p text:style-name="Text_20_body">Quando faltam 100 também.</text:p>
      <text:p text:style-name="Text_20_body">Mas quando faltam 40… ou 20…</text:p>
      <text:p text:style-name="Text_20_body">algo muda.</text:p>
      <text:p text:style-name="Text_20_body">De repente percebes que estás a comprar saquetas inteiras para aproveitar um único cromo.</text:p>
      <text:p text:style-name="Text_20_body">E às vezes nem aparece.</text:p>
      <text:p text:style-name="Text_20_body">É aqui que muitos colecionadores em Portugal começam a procurar formas de <text:span text:style-name="Strong_20_Emphasis">trocar cromos Panini</text:span>.</text:p>
      <text:p text:style-name="Text_20_body">Não porque seja mais barato.</text:p>
      <text:p text:style-name="Text_20_body">Mas porque começa a fazer mais sentido.</text:p>
      <text:p text:style-name="Horizontal_20_Line"/>
      <text:h text:style-name="Heading_20_2" text:outline-level="2"><text:soft-page-break/>O curioso é que provavelmente já tens o que outra pessoa procura</text:h>
      <text:p text:style-name="Text_20_body">É uma coisa engraçada nas coleções.</text:p>
      <text:p text:style-name="Text_20_body">Aquilo que para ti é um repetido sem valor…</text:p>
      <text:p text:style-name="Text_20_body">pode ser exatamente o último cromo que falta a outra pessoa.</text:p>
      <text:p text:style-name="Text_20_body">E o contrário também acontece.</text:p>
      <text:p text:style-name="Text_20_body">Muitas coleções acabam por ser completas não porque alguém comprou mais.</text:p>
      <text:p text:style-name="Text_20_body">Mas porque duas pessoas perceberam que já tinham tudo o que precisavam.</text:p>
      <text:p text:style-name="Text_20_body">Só estava distribuído de forma errada.</text:p>
      <text:p text:style-name="Horizontal_20_Line"/>
      <text:h text:style-name="Heading_20_2" text:outline-level="2">Completar uma caderneta não é um problema de dinheiro</text:h>
      <text:p text:style-name="Text_20_body">Isto costuma surpreender quem está a começar.</text:p>
      <text:p text:style-name="Text_20_body">Mas muitos colecionadores mais experientes já perceberam uma coisa.</text:p>
      <text:p text:style-name="Text_20_body">Chega um ponto em que comprar mais não acelera.</text:p>
      <text:p text:style-name="Text_20_body">Só aumenta repetidos.</text:p>
      <text:p text:style-name="Text_20_body">O que acelera normalmente é:</text:p>
      <text:list xml:id="list5921210648009821460" text:style-name="L3">
        <text:list-item>
          <text:p text:style-name="P6">ter os repetidos organizados </text:p>
        </text:list-item>
        <text:list-item>
          <text:p text:style-name="P6">saber o que falta </text:p>
        </text:list-item>
        <text:list-item>
          <text:p text:style-name="P3">encontrar pessoas compatíveis </text:p>
        </text:list-item>
      </text:list>
      <text:p text:style-name="Text_20_body">Parece simples.</text:p>
      <text:p text:style-name="Text_20_body">Mas muda completamente a experiência.</text:p>
      <text:p text:style-name="Horizontal_20_Line"/>
      <text:h text:style-name="Heading_20_2" text:outline-level="2">Há quem descubra tarde demais</text:h>
      <text:p text:style-name="Text_20_body">Todos conhecemos alguém assim.</text:p>
      <text:p text:style-name="Text_20_body">A pessoa que compra saquetas até ao último dia.</text:p>
      <text:p text:style-name="Text_20_body">Que acaba com centenas de repetidos.</text:p>
      <text:p text:style-name="Text_20_body">Que gasta mais do que queria.</text:p>
      <text:p text:style-name="Text_20_body">E depois percebe que podia ter terminado antes.</text:p>
      <text:p text:style-name="Text_20_body">Trocar não elimina a graça da coleção.</text:p>
      <text:p text:style-name="Text_20_body">Na verdade, para muita gente, melhora.</text:p>
      <text:p text:style-name="Text_20_body">Porque deixa de ser sorte.</text:p>
      <text:p text:style-name="Text_20_body">Passa a ser estratégia.</text:p>
      <text:p text:style-name="Horizontal_20_Line"/>
      <text:h text:style-name="Heading_20_2" text:outline-level="2"><text:soft-page-break/>Uma pequena mudança que ajuda muito</text:h>
      <text:p text:style-name="Text_20_body">Se ainda estás a completar uma coleção, experimenta isto.</text:p>
      <text:p text:style-name="Text_20_body">Pega nos repetidos.</text:p>
      <text:p text:style-name="Text_20_body">Organiza por número.</text:p>
      <text:p text:style-name="Text_20_body">Escreve os que faltam.</text:p>
      <text:p text:style-name="Text_20_body">Antes de comprar mais uma saqueta…</text:p>
      <text:p text:style-name="Text_20_body">procura alguém que tenha esses números.</text:p>
      <text:p text:style-name="Text_20_body">Não precisas trocar tudo.</text:p>
      <text:p text:style-name="Text_20_body">Mas faz o teste.</text:p>
      <text:p text:style-name="Text_20_body">Normalmente a primeira troca muda completamente a forma como olhas para a coleção.</text:p>
      <text:p text:style-name="Horizontal_20_Line"/>
      <text:h text:style-name="Heading_20_2" text:outline-level="2">E quando a caderneta estiver completa?</text:h>
      <text:p text:style-name="Text_20_body">Curiosamente é quando muitas pessoas continuam.</text:p>
      <text:p text:style-name="Text_20_body">Porque descobrem que colecionar nunca foi só terminar.</text:p>
      <text:p text:style-name="Text_20_body">Era também:</text:p>
      <text:p text:style-name="Text_20_body">abrir saquetas,</text:p>
      <text:p text:style-name="Text_20_body">comparar listas,</text:p>
      <text:p text:style-name="Text_20_body">falar com outras pessoas,</text:p>
      <text:p text:style-name="Text_20_body">e encontrar aquele cromo impossível.</text:p>
      <text:p text:style-name="Horizontal_20_Line"/>
      <text:h text:style-name="Heading_20_2" text:outline-level="2">Antes de comprares mais uma saqueta…</text:h>
      <text:p text:style-name="Text_20_body">Olha para os teus repetidos.</text:p>
      <text:p text:style-name="Text_20_body">Talvez já tenhas metade da solução em cima da mesa.</text:p>
      <text:p text:style-name="Text_20_body">E talvez alguém esteja exatamente à procura dos cromos que tens guardados.</text:p>
      <text:p text:style-name="Text_20_body">→ <text:span text:style-name="T2">Abrir marketplace </text:span><text:span text:style-name="T5">(enlace marketplace)</text:span></text:p>
      <text:p text:style-name="Text_20_body"/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5-27T07:54:26.16</meta:creation-date>
    <meta:document-statistic meta:table-count="0" meta:image-count="0" meta:object-count="0" meta:page-count="3" meta:paragraph-count="78" meta:word-count="526" meta:character-count="3144"/>
    <dc:date>2026-05-27T07:59:31.25</dc:date>
    <dc:creator>Alberto Pujol</dc:creator>
    <meta:editing-duration>PT5M5S</meta:editing-duration>
    <meta:editing-cycles>1</meta:editing-cycles>
    <meta:generator>OpenOffice/4.1.14$Win32 OpenOffice.org_project/4114m1$Build-9811</meta:generator>
  </office:meta>
</office:document-meta>
</file>
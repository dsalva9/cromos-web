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0000000400A36CC1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das protectoras para cromos: cuándo merece la pena usarlas (y cuándo no)</text:h>
      <text:p text:style-name="Text_20_body"/>
      <text:p text:style-name="Text_20_body">Hay una escena bastante típica entre coleccionistas.</text:p>
      <text:p text:style-name="Text_20_body">Un día abres un cajón o recuperas una caja que llevaba años guardada. Encuentras un álbum antiguo o una pequeña pila de cromos que hacía tiempo que no tocabas y empiezas a mirarlos uno por uno. Durante unos minutos todo sigue igual que cuando los dejaste.</text:p>
      <text:p text:style-name="Text_20_body">Hasta que aparece uno.</text:p>
      <text:p text:style-name="Text_20_body">Ese cromo.</text:p>
      <text:p text:style-name="Text_20_body">El que recuerdas perfectamente cuándo conseguiste. El que te faltaba para cerrar una página. El que intercambiaste después de semanas buscándolo.</text:p>
      <text:p text:style-name="Text_20_body">Y entonces ves una esquina un poco blanqueada, una ligera curva o una pequeña marca que antes no estaba.</text:p>
      <text:p text:style-name="Text_20_body">La primera reacción suele ser pensar que alguien lo dobló o que se guardó mal.</text:p>
      <text:p text:style-name="Text_20_body">Pero muchas veces no ha pasado nada raro.</text:p>
      <text:p text:style-name="Text_20_body">Simplemente han pasado años.</text:p>
      <text:p text:style-name="Text_20_body">Y el cromo se ha ido desgastando poco a poco.</text:p>
      <text:p text:style-name="Horizontal_20_Line"/>
      <text:h text:style-name="Heading_20_2" text:outline-level="2">Conservar cromos no suele ir de dinero</text:h>
      <text:p text:style-name="Text_20_body">Creo que aquí hay una idea equivocada bastante común.</text:p>
      <text:p text:style-name="Text_20_body">Cuando alguien habla de <text:span text:style-name="T2">fundas protectoras</text:span> (añadir enlace de amazon) mucha gente piensa automáticamente en coleccionistas extremos o en cartas que valen cientos de euros.</text:p>
      <text:p text:style-name="Text_20_body">Pero en la práctica la mayoría de gente que protege sus cromos no lo hace porque espere venderlos.</text:p>
      <text:p text:style-name="Text_20_body">Lo hace porque quiere abrir el álbum dentro de diez años y encontrarlo igual.</text:p>
      <text:p text:style-name="Text_20_body">Al final coleccionar tiene mucho de recuerdo.</text:p>
      <text:p text:style-name="Text_20_body">Y hay ciertos cromos que, aunque objetivamente no valgan mucho dinero, tienen valor para quien los consiguió.</text:p>
      <text:p text:style-name="Text_20_body">El último que faltaba.</text:p>
      <text:p text:style-name="Text_20_body">El que completó una página.</text:p>
      <text:p text:style-name="Text_20_body">El que consiguió tu hijo.</text:p>
      <text:p text:style-name="Text_20_body">El que intercambiaste después de media tarde buscando.</text:p>
      <text:p text:style-name="Horizontal_20_Line"/>
      <text:h text:style-name="Heading_20_2" text:outline-level="2">El desgaste casi nunca viene de donde pensamos</text:h>
      <text:p text:style-name="Text_20_body">Lo curioso es que los cromos rara vez se estropean por un accidente grande.</text:p>
      <text:p text:style-name="Text_20_body">No suele ser una caída ni un vaso de agua.</text:p>
      <text:p text:style-name="Text_20_body"><text:soft-page-break/>Normalmente son pequeñas cosas repetidas muchas veces.</text:p>
      <text:p text:style-name="Text_20_body">Sacarlos para enseñarlos.</text:p>
      <text:p text:style-name="Text_20_body">Moverlos entre cajas.</text:p>
      <text:p text:style-name="Text_20_body">Comparar repetidos.</text:p>
      <text:p text:style-name="Text_20_body">Buscar uno concreto.</text:p>
      <text:p text:style-name="Text_20_body">Guardarlos apretados.</text:p>
      <text:p text:style-name="Text_20_body">Tocarlos siempre por los bordes.</text:p>
      <text:p text:style-name="Text_20_body">Nada de eso parece importante cuando ocurre.</text:p>
      <text:p text:style-name="Text_20_body">Pero después de años sí se nota.</text:p>
      <text:p text:style-name="Text_20_body">Y ahí es donde mucha gente empieza a entender para qué sirven realmente las fundas.</text:p>
      <text:p text:style-name="Horizontal_20_Line"/>
      <text:h text:style-name="Heading_20_2" text:outline-level="2">Qué aportan realmente unas fundas protectoras</text:h>
      <text:p text:style-name="Text_20_body">Aquí también hay bastante mito.</text:p>
      <text:p text:style-name="Text_20_body">Una funda no convierte un cromo normal en una pieza de colección.</text:p>
      <text:p text:style-name="Text_20_body">Tampoco evita absolutamente cualquier daño.</text:p>
      <text:p text:style-name="Text_20_body">Lo que hace es bastante más sencillo: crea una pequeña barrera entre el cromo y el uso normal.</text:p>
      <text:p text:style-name="Text_20_body">Las fundas blandas transparentes que suelen utilizar muchos coleccionistas están pensadas para proteger frente al desgaste cotidiano.</text:p>
      <text:p text:style-name="Text_20_body">Reducen rozaduras, evitan que las esquinas sufran tanto y ayudan a mantener los cromos más limpios cuando se manipulan con frecuencia.</text:p>
      <text:p text:style-name="Text_20_body">Y hay otro detalle que mucha gente no tiene en cuenta: cuando los cromos están protegidos acabas tratándolos mejor casi sin darte cuenta.</text:p>
      <text:p text:style-name="Text_20_body"/>
      <text:p text:style-name="Text_20_body"><draw:frame draw:style-name="fr1" draw:name="gráficos1" text:anchor-type="paragraph" svg:width="15.259cm" svg:height="7.685cm" draw:z-index="0"><draw:image xlink:href="Pictures/100000000000060000000400A36CC101.png" xlink:type="simple" xlink:show="embed" xlink:actuate="onLoad"/></draw:frame></text:p>
      <text:p text:style-name="Horizontal_20_Line"/>
      <text:h text:style-name="Heading_20_2" text:outline-level="2"><text:soft-page-break/>No hace falta enfundarlo todo</text:h>
      <text:p text:style-name="Text_20_body">Después de años viendo colecciones, creo que aquí merece la pena ser práctico.</text:p>
      <text:p text:style-name="Text_20_body">No creo que tenga sentido comprar fundas para absolutamente todos los cromos.</text:p>
      <text:p text:style-name="Text_20_body">Si tienes cientos o miles, probablemente ni lo disfrutes.</text:p>
      <text:p text:style-name="Text_20_body">Pero sí creo que hay casos donde merece mucho la pena.</text:p>
      <text:p text:style-name="Text_20_body">Por ejemplo:</text:p>
      <text:list xml:id="list5038312295973550663" text:style-name="L1">
        <text:list-item>
          <text:p text:style-name="P1">cromos difíciles de conseguir</text:p>
        </text:list-item>
        <text:list-item>
          <text:p text:style-name="P1">colecciones completas</text:p>
        </text:list-item>
        <text:list-item>
          <text:p text:style-name="P1">cromos que quieres intercambiar</text:p>
        </text:list-item>
        <text:list-item>
          <text:p text:style-name="P1">favoritos personales</text:p>
        </text:list-item>
        <text:list-item>
          <text:p text:style-name="P1">cromos que sueles enseñar o revisar mucho</text:p>
        </text:list-item>
      </text:list>
      <text:p text:style-name="Text_20_body">Muchas veces proteger solo una parte de la colección ya cambia muchísimo cómo envejece.</text:p>
      <text:p text:style-name="Horizontal_20_Line"/>
      <text:h text:style-name="Heading_20_2" text:outline-level="2">Lo que más diferencia he notado con el tiempo</text:h>
      <text:p text:style-name="Text_20_body">Si tuviera que dar un consejo a alguien que empieza sería este:</text:p>
      <text:p text:style-name="Text_20_body">no te obsesiones con comprar accesorios.</text:p>
      <text:p text:style-name="Text_20_body">Obsésionate un poco más con guardar bien.</text:p>
      <text:p text:style-name="Text_20_body">Evitar humedad.</text:p>
      <text:p text:style-name="Text_20_body">No apilar demasiado.</text:p>
      <text:p text:style-name="Text_20_body">No dejar álbumes en trasteros.</text:p>
      <text:p text:style-name="Text_20_body">No manipular siempre los mismos cromos.</text:p>
      <text:p text:style-name="Text_20_body">Y si hay algunos que sabes que te gustaría conservar años…</text:p>
      <text:p text:style-name="Text_20_body">protegerlos antes de que se deterioren.</text:p>
      <text:p text:style-name="Text_20_body">Porque una vez aparece el desgaste ya no hay mucho que hacer.</text:p>
      <text:p text:style-name="Horizontal_20_Line"/>
      <text:h text:style-name="Heading_20_2" text:outline-level="2">Entonces, ¿merecen la pena?</text:h>
      <text:p text:style-name="Text_20_body">Para mí sí.</text:p>
      <text:p text:style-name="Text_20_body">Pero no porque hagan que una colección valga más.</text:p>
      <text:p text:style-name="Text_20_body">Sino porque ayudan a conservar mejor todo el tiempo que has dedicado a completarla.</text:p>
      <text:p text:style-name="Text_20_body">Y eso, cuando vuelves a abrir un álbum muchos años después, se nota bastante más de lo que parece.</text:p>
      <text:p text:style-name="Horizontal_20_Line"/>
      <text:h text:style-name="Heading_20_2" text:outline-level="2"><text:soft-page-break/>Una idea sencilla para empezar</text:h>
      <text:p text:style-name="Text_20_body">No hace falta proteger toda la colección hoy.</text:p>
      <text:p text:style-name="Text_20_body">Elige tus 20 cromos favoritos.</text:p>
      <text:p text:style-name="Text_20_body">Ponlos aparte.</text:p>
      <text:p text:style-name="Text_20_body">Míralos dentro de unos meses.</text:p>
      <text:p text:style-name="Text_20_body">Probablemente entiendas bastante rápido por qué tantos coleccionistas terminan usando fundas.</text:p>
      <text:p text:style-name="Horizontal_20_Line"/>
      <text:h text:style-name="Heading_20_2" text:outline-level="2">Antes de cerrar el álbum</text:h>
      <text:p text:style-name="Text_20_body">Piensa una cosa.</text:p>
      <text:p text:style-name="Text_20_body">Dentro de unos años seguramente no recordarás cuánto costó cada sobre.</text:p>
      <text:p text:style-name="Text_20_body">Pero sí recordarás cómo se veía esa colección cuando la terminaste.</text:p>
      <text:p text:style-name="Text_20_body">Y conservarla bien es una forma bastante bonita de alargar esa sensación.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Pujol</meta:initial-creator>
    <meta:creation-date>2026-05-27T08:05:50.33</meta:creation-date>
    <dc:date>2026-05-27T08:13:20.01</dc:date>
    <dc:creator>Alberto Pujol</dc:creator>
    <meta:editing-duration>PT7M29S</meta:editing-duration>
    <meta:editing-cycles>2</meta:editing-cycles>
    <meta:generator>OpenOffice/4.1.14$Win32 OpenOffice.org_project/4114m1$Build-9811</meta:generator>
    <meta:document-statistic meta:table-count="0" meta:image-count="1" meta:object-count="0" meta:page-count="4" meta:paragraph-count="82" meta:word-count="756" meta:character-count="4520"/>
  </office:meta>
</office:document-meta>
</file>
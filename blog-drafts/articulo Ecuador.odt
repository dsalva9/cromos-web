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Intercambiar cromos de fútbol en Ecuador | Completar álbum Panini</text:h>
      <text:p text:style-name="Text_20_body">Intercambiar cromos de fútbol en Ecuador: cómo completar tu álbum Panini más rápido</text:p>
      <text:p text:style-name="Text_20_body">Completar un álbum de fútbol tiene algo especial. Abrir sobres, descubrir nuevos jugadores y acercarse poco a poco al objetivo forma parte de la experiencia. Pero también llega un momento que todos los coleccionistas conocen: empiezan a aparecer demasiados cromos repetidos.</text:p>
      <text:p text:style-name="Text_20_body">Compras sobres y vuelven a salir jugadores que ya tienes. El coste sube y avanzar cada vez cuesta más.</text:p>
      <text:p text:style-name="Text_20_body">Por eso cada vez más personas buscan formas de <text:span text:style-name="Strong_20_Emphasis">intercambiar cromos de fútbol en Ecuador</text:span> y completar su colección sin seguir comprando sobres constantemente.</text:p>
      <text:p text:style-name="Text_20_body">Si has llegado al punto donde te faltan pocos cromos para terminar el álbum, probablemente intercambiar sea la forma más eficiente de avanzar.</text:p>
      <text:p text:style-name="Horizontal_20_Line"/>
      <text:h text:style-name="Heading_20_2" text:outline-level="2">Por qué intercambiar cromos suele ser mejor que comprar más sobres</text:h>
      <text:p text:style-name="Text_20_body">Cuando empiezas una colección, comprar sobres funciona bien.</text:p>
      <text:p text:style-name="Text_20_body">Pero cuando ya tienes gran parte del álbum completado ocurre algo:</text:p>
      <text:p text:style-name="Text_20_body">cada sobre nuevo tiene muchas probabilidades de incluir cromos que ya tienes.</text:p>
      <text:p text:style-name="Text_20_body">Intercambiar cambia completamente la lógica.</text:p>
      <text:p text:style-name="Text_20_body">En lugar de depender del azar:</text:p>
      <text:list xml:id="list145273679870061480" text:style-name="L1">
        <text:list-item>
          <text:p text:style-name="P1">aprovechas tus repetidos</text:p>
        </text:list-item>
        <text:list-item>
          <text:p text:style-name="P1">buscas exactamente los cromos que te faltan</text:p>
        </text:list-item>
        <text:list-item>
          <text:p text:style-name="P1">gastas menos dinero</text:p>
        </text:list-item>
        <text:list-item>
          <text:p text:style-name="P1">completas el álbum más rápido</text:p>
        </text:list-item>
      </text:list>
      <text:p text:style-name="Text_20_body">Esto es especialmente útil en colecciones populares como <text:span text:style-name="Strong_20_Emphasis">Panini</text:span> o el <text:span text:style-name="Strong_20_Emphasis">Mundial 2026</text:span>.</text:p>
      <text:p text:style-name="Horizontal_20_Line"/>
      <text:h text:style-name="Heading_20_2" text:outline-level="2">Cómo completar un álbum Panini de forma más eficiente</text:h>
      <text:p text:style-name="Text_20_body">Muchos coleccionistas siguen una estrategia sencilla.</text:p>
      <text:h text:style-name="Heading_20_3" text:outline-level="3">1. Construir una base</text:h>
      <text:p text:style-name="Text_20_body">Durante las primeras semanas compran sobres normalmente.</text:p>
      <text:h text:style-name="Heading_20_3" text:outline-level="3">2. Separar repetidos</text:h>
      <text:p text:style-name="Text_20_body">Guardar los cromos repetidos organizados por número.</text:p>
      <text:h text:style-name="Heading_20_3" text:outline-level="3"><text:soft-page-break/>3. Buscar intercambios</text:h>
      <text:p text:style-name="Text_20_body">En lugar de seguir comprando.</text:p>
      <text:h text:style-name="Heading_20_3" text:outline-level="3">4. Comprar solo los últimos cromos</text:h>
      <text:p text:style-name="Text_20_body">Así se evita gastar demasiado intentando conseguir unos pocos números.</text:p>
      <text:p text:style-name="Text_20_body">Esta estrategia suele funcionar mucho mejor que intentar terminar el álbum únicamente con sobres.</text:p>
      <text:p text:style-name="Horizontal_20_Line"/>
      <text:h text:style-name="Heading_20_2" text:outline-level="2">Cambiar cromos del Mundial 2026 en Ecuador</text:h>
      <text:p text:style-name="Text_20_body">Cada Mundial genera una comunidad enorme de coleccionistas.</text:p>
      <text:p text:style-name="Text_20_body">Y ocurre siempre lo mismo:</text:p>
      <text:p text:style-name="Text_20_body">al principio hay mucha compra de sobres.</text:p>
      <text:p text:style-name="Text_20_body">Después empieza la fase de intercambio.</text:p>
      <text:p text:style-name="Text_20_body">Cuanto antes organices tus repetidos, más fácil será encontrar personas que buscan exactamente los cromos que tienes.</text:p>
      <text:p text:style-name="Text_20_body">Para aprovechar mejor el intercambio:</text:p>
      <text:list xml:id="list3268864875873091512" text:style-name="L2">
        <text:list-item>
          <text:p text:style-name="P2">mantén tu lista actualizada</text:p>
        </text:list-item>
        <text:list-item>
          <text:p text:style-name="P2">responde rápido</text:p>
        </text:list-item>
        <text:list-item>
          <text:p text:style-name="P2">revisa qué cromos son más difíciles</text:p>
        </text:list-item>
        <text:list-item>
          <text:p text:style-name="P2">intenta cerrar varios intercambios juntos</text:p>
        </text:list-item>
      </text:list>
      <text:p text:style-name="Horizontal_20_Line"/>
      <text:h text:style-name="Heading_20_2" text:outline-level="2">Cómo encontrar mejores intercambios</text:h>
      <text:h text:style-name="Heading_20_3" text:outline-level="3">Cuida el estado de los cromos</text:h>
      <text:p text:style-name="Text_20_body">Un cromo doblado o desgastado pierde valor. Para ello te recomendamos que uses <text:span text:style-name="T2">una de estas fundas</text:span> (añadir enlace amazon)</text:p>
      <text:h text:style-name="Heading_20_3" text:outline-level="3">Sé activo </text:h>
      <text:p text:style-name="Text_20_body">Cuantos más repetidos tengas publicados, más opciones tendrás de que te contacten. Si además contestas rápido y consigues que te valoren, mejorarás tu reputación, lo que te dará mayor visibilidad.</text:p>
      <text:h text:style-name="Heading_20_3" text:outline-level="3">Sé claro</text:h>
      <text:p text:style-name="Text_20_body">Indica la mayor parte de datos de tus cromos. El nombre del jugador, el equipo o selección donde juega, el número de cromo, la colección a la que pertenece.. los usuarios pueden buscar filtrando cualquiera de esos datos.</text:p>
      <text:p text:style-name="Horizontal_20_Line"/>
      <text:h text:style-name="Heading_20_2" text:outline-level="2"><text:soft-page-break/>Preguntas frecuentes de coleccionistas en Ecuador</text:h>
      <text:h text:style-name="Heading_20_3" text:outline-level="3">¿Puedo intercambiar cromos desde cualquier ciudad de Ecuador?</text:h>
      <text:p text:style-name="Text_20_body">Sí. Muchas personas combinan intercambios locales con envíos.</text:p>
      <text:h text:style-name="Heading_20_3" text:outline-level="3">¿Solo sirve para álbumes Panini?</text:h>
      <text:p text:style-name="Text_20_body">No. También puede servir para otras colecciones.</text:p>
      <text:h text:style-name="Heading_20_3" text:outline-level="3">¿Hace falta tener muchos repetidos?</text:h>
      <text:p text:style-name="Text_20_body">No. Incluso con pocos cromos ya puedes empezar.</text:p>
      <text:h text:style-name="Heading_20_3" text:outline-level="3">¿Es mejor intercambiar o comprar sobres?</text:h>
      <text:p text:style-name="Text_20_body">Depende del punto en el que estés. Cuando el álbum está avanzado, intercambiar suele ser más eficiente.</text:p>
      <text:p text:style-name="Horizontal_20_Line"/>
      <text:h text:style-name="Heading_20_2" text:outline-level="2">Empieza a completar tu colección</text:h>
      <text:p text:style-name="Text_20_body">Si tienes cromos repetidos acumulándose y cada vez te cuesta más avanzar, quizá ha llegado el momento de probar una estrategia diferente.</text:p>
      <text:p text:style-name="Text_20_body">Publica tus repetidos, busca coincidencias y descubre si alguien ya tiene justo el cromo que te falta.</text:p>
      <text:p text:style-name="Text_20_body"><text:span text:style-name="Strong_20_Emphasis">→ </text:span><text:span text:style-name="Strong_20_Emphasis"><text:span text:style-name="T1">Abrir marketplace</text:span></text:span><text:span text:style-name="Strong_20_Emphasis"> (enlace marketplace)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5-27T07:45:18.59</meta:creation-date>
    <meta:document-statistic meta:table-count="0" meta:image-count="0" meta:object-count="0" meta:page-count="3" meta:paragraph-count="59" meta:word-count="589" meta:character-count="3761"/>
    <dc:date>2026-05-27T07:53:57.75</dc:date>
    <dc:creator>Alberto Pujol</dc:creator>
    <meta:editing-duration>PT8M42S</meta:editing-duration>
    <meta:editing-cycles>1</meta:editing-cycles>
    <meta:generator>OpenOffice/4.1.14$Win32 OpenOffice.org_project/4114m1$Build-9811</meta:generator>
  </office:meta>
</office:document-meta>
</file>